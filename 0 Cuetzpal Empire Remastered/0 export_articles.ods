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41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  <table:table-cell office:value-type="string">
            <text:p>Photo 8</text:p>
          </table:table-cell>
          <table:table-cell office:value-type="string">
            <text:p>Photo 9</text:p>
          </table:table-cell>
          <table:table-cell office:value-type="string">
            <text:p>Photo 10</text:p>
          </table:table-cell>
          <table:table-cell table:number-columns-repeated="2"/>
        </table:table-row>
        <table:table-row table:style-name="ro1">
          <table:table-cell office:value-type="string">
            <text:p>Chameleon Bow x10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hameleon Bow x10 1</text:p>
          </table:table-cell>
          <table:table-cell office:value-type="string">
            <text:p>Chameleon Bow x10 2</text:p>
          </table:table-cell>
          <table:table-cell office:value-type="string">
            <text:p>Chameleon Bow x10 3</text:p>
          </table:table-cell>
          <table:table-cell office:value-type="string">
            <text:p>Chameleon Bow x10 4</text:p>
          </table:table-cell>
          <table:table-cell office:value-type="string">
            <text:p>Chameleon Bow x10 5</text:p>
          </table:table-cell>
          <table:table-cell office:value-type="string">
            <text:p>Chameleon Bow x10 6</text:p>
          </table:table-cell>
          <table:table-cell table:number-columns-repeated="6"/>
        </table:table-row>
        <table:table-row table:style-name="ro2">
          <table:table-cell office:value-type="string">
            <text:p>Chameleon Bow Etat-Major 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hameleon Bow Etat-Major 1</text:p>
          </table:table-cell>
          <table:table-cell office:value-type="string">
            <text:p>Chameleon Bow Etat-Major 2</text:p>
          </table:table-cell>
          <table:table-cell office:value-type="string">
            <text:p>Chameleon Bow Etat-Major 3</text:p>
          </table:table-cell>
          <table:table-cell table:number-columns-repeated="9"/>
        </table:table-row>
        <table:table-row table:style-name="ro2">
          <table:table-cell office:value-type="string">
            <text:p>Chameleon Blowpipe x10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hameleon Blowpipe x10 1</text:p>
          </table:table-cell>
          <table:table-cell office:value-type="string">
            <text:p>Chameleon Blowpipe x10 2</text:p>
          </table:table-cell>
          <table:table-cell office:value-type="string">
            <text:p>Chameleon Blowpipe x10 3</text:p>
          </table:table-cell>
          <table:table-cell office:value-type="string">
            <text:p>Chameleon Blowpipe x10 4</text:p>
          </table:table-cell>
          <table:table-cell office:value-type="string">
            <text:p>Chameleon Blowpipe x10 5</text:p>
          </table:table-cell>
          <table:table-cell office:value-type="string">
            <text:p>Chameleon Blowpipe x10 6</text:p>
          </table:table-cell>
          <table:table-cell table:number-columns-repeated="6"/>
        </table:table-row>
        <table:table-row table:style-name="ro2">
          <table:table-cell office:value-type="string">
            <text:p>Chameleon Blowpipe Etat-Major 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hameleon Blowpipe Etat-Major 1</text:p>
          </table:table-cell>
          <table:table-cell office:value-type="string">
            <text:p>Chameleon Blowpipe Etat-Major 2</text:p>
          </table:table-cell>
          <table:table-cell office:value-type="string">
            <text:p>Chameleon Blowpipe Etat-Major 3</text:p>
          </table:table-cell>
          <table:table-cell table:number-columns-repeated="9"/>
        </table:table-row>
        <table:table-row table:style-name="ro2">
          <table:table-cell office:value-type="string">
            <text:p>Skink Bow Etat-Major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kink Bow Etat-Major 1</text:p>
          </table:table-cell>
          <table:table-cell office:value-type="string">
            <text:p>Skink Bow Etat-Major 2</text:p>
          </table:table-cell>
          <table:table-cell office:value-type="string">
            <text:p>Skink Bow Etat-Major 3</text:p>
          </table:table-cell>
          <table:table-cell table:number-columns-repeated="9"/>
        </table:table-row>
        <table:table-row table:style-name="ro2">
          <table:table-cell office:value-type="string">
            <text:p>Skink Spear Etat-Major 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kink Spear Etat-Major 1</text:p>
          </table:table-cell>
          <table:table-cell office:value-type="string">
            <text:p>Skink Spear Etat-Major 2</text:p>
          </table:table-cell>
          <table:table-cell office:value-type="string">
            <text:p>Skink Spear Etat-Major 3</text:p>
          </table:table-cell>
          <table:table-cell table:number-columns-repeated="9"/>
        </table:table-row>
        <table:table-row table:style-name="ro1">
          <table:table-cell office:value-type="string">
            <text:p>Cipactli Etat-Major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Cipactli Etat-Major 1</text:p>
          </table:table-cell>
          <table:table-cell office:value-type="string">
            <text:p>Cipactli Etat-Major 2</text:p>
          </table:table-cell>
          <table:table-cell office:value-type="string">
            <text:p>Cipactli Etat-Major 3</text:p>
          </table:table-cell>
          <table:table-cell table:number-columns-repeated="9"/>
        </table:table-row>
        <table:table-row table:style-name="ro2">
          <table:table-cell office:value-type="string">
            <text:p>Hero Chameleon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40 mm</text:p>
          </table:table-cell>
          <table:table-cell office:value-type="string">
            <text:p>35x60 mm</text:p>
          </table:table-cell>
          <table:table-cell office:value-type="string">
            <text:p>Hero Chameleon 1</text:p>
          </table:table-cell>
          <table:table-cell office:value-type="string">
            <text:p>Hero Chameleon 2</text:p>
          </table:table-cell>
          <table:table-cell office:value-type="string">
            <text:p>Hero Chameleon 3</text:p>
          </table:table-cell>
          <table:table-cell table:number-columns-repeated="9"/>
        </table:table-row>
        <table:table-row table:style-name="ro2">
          <table:table-cell office:value-type="string">
            <text:p>Kuaxotl Knight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50mm</text:p>
          </table:table-cell>
          <table:table-cell office:value-type="string">
            <text:p>60 mm</text:p>
          </table:table-cell>
          <table:table-cell office:value-type="string">
            <text:p>Kuaxotl Knight 1</text:p>
          </table:table-cell>
          <table:table-cell office:value-type="string">
            <text:p>Kuaxotl Knight 2</text:p>
          </table:table-cell>
          <table:table-cell office:value-type="string">
            <text:p>Kuaxotl Knight 3</text:p>
          </table:table-cell>
          <table:table-cell office:value-type="string">
            <text:p>Kuaxotl Knight 4</text:p>
          </table:table-cell>
          <table:table-cell table:number-columns-repeated="8"/>
        </table:table-row>
        <table:table-row table:style-name="ro2">
          <table:table-cell office:value-type="string">
            <text:p>Skink Heroine Knight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Skink Heroine Knight 1</text:p>
          </table:table-cell>
          <table:table-cell office:value-type="string">
            <text:p>Skink Heroine Knight 2</text:p>
          </table:table-cell>
          <table:table-cell office:value-type="string">
            <text:p>Skink Heroine Knight 3</text:p>
          </table:table-cell>
          <table:table-cell table:number-columns-repeated="9"/>
        </table:table-row>
        <table:table-row table:style-name="ro2">
          <table:table-cell office:value-type="string">
            <text:p>Swarm x3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Swarm x3 1</text:p>
          </table:table-cell>
          <table:table-cell office:value-type="string">
            <text:p>Swarm x3 2</text:p>
          </table:table-cell>
          <table:table-cell office:value-type="string">
            <text:p>Swarm x3 3</text:p>
          </table:table-cell>
          <table:table-cell table:number-columns-repeated="9"/>
        </table:table-row>
        <table:table-row table:style-name="ro2">
          <table:table-cell office:value-type="string">
            <text:p>Ceratomimus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Ceratomimus 1</text:p>
          </table:table-cell>
          <table:table-cell office:value-type="string">
            <text:p>Ceratomimus 2</text:p>
          </table:table-cell>
          <table:table-cell office:value-type="string">
            <text:p>Ceratomimus 3</text:p>
          </table:table-cell>
          <table:table-cell table:number-columns-repeated="9"/>
        </table:table-row>
        <table:table-row table:style-name="ro1">
          <table:table-cell office:value-type="string">
            <text:p>Tezatlipoca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50mm</text:p>
          </table:table-cell>
          <table:table-cell office:value-type="string">
            <text:p>60 mm</text:p>
          </table:table-cell>
          <table:table-cell office:value-type="string">
            <text:p>Tezatlipoca 1</text:p>
          </table:table-cell>
          <table:table-cell office:value-type="string">
            <text:p>Tezatlipoca 2</text:p>
          </table:table-cell>
          <table:table-cell office:value-type="string">
            <text:p>Tezatlipoca 3</text:p>
          </table:table-cell>
          <table:table-cell office:value-type="string">
            <text:p>Tezatlipoca 4</text:p>
          </table:table-cell>
          <table:table-cell table:number-columns-repeated="8"/>
        </table:table-row>
        <table:table-row table:style-name="ro2">
          <table:table-cell office:value-type="string">
            <text:p>Cipactli Heroine </text:p>
          </table:table-cell>
          <table:table-cell office:value-type="currency" office:currency="EUR" office:value="55">
            <text:p>55,00 €</text:p>
          </table:table-cell>
          <table:table-cell office:value-type="string">
            <text:p>90x120 mm</text:p>
          </table:table-cell>
          <table:table-cell office:value-type="string">
            <text:p>95x150 mm</text:p>
          </table:table-cell>
          <table:table-cell office:value-type="string">
            <text:p>Cipactli Heroine 1</text:p>
          </table:table-cell>
          <table:table-cell office:value-type="string">
            <text:p>Cipactli Heroine 2</text:p>
          </table:table-cell>
          <table:table-cell office:value-type="string">
            <text:p>Cipactli Heroine 3</text:p>
          </table:table-cell>
          <table:table-cell office:value-type="string">
            <text:p>Cipactli Heroine 4</text:p>
          </table:table-cell>
          <table:table-cell office:value-type="string">
            <text:p>Cipactli Heroine 5</text:p>
          </table:table-cell>
          <table:table-cell table:number-columns-repeated="7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6">16/06/2026</text:date>, <text:time>20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16T20:35:07.12</dc:date>
    <dc:creator>Ycham Bounouar</dc:creator>
    <meta:editing-duration>PT1H49M22S</meta:editing-duration>
    <meta:editing-cycles>11</meta:editing-cycles>
    <meta:document-statistic meta:table-count="1" meta:cell-count="122" meta:object-count="0"/>
  </office:meta>
</office:document-meta>
</file>