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  <table:table-cell office:value-type="string">
            <text:p>Photo 9</text:p>
          </table:table-cell>
          <table:table-cell office:value-type="string">
            <text:p>Photo 10</text:p>
          </table:table-cell>
          <table:table-cell office:value-type="string">
            <text:p>Photo 11</text:p>
          </table:table-cell>
          <table:table-cell office:value-type="string">
            <text:p>Photo 12</text:p>
          </table:table-cell>
        </table:table-row>
        <table:table-row table:style-name="ro2">
          <table:table-cell office:value-type="string">
            <text:p>Yarablin Etat-Major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Yarablin Etat-Major 1</text:p>
          </table:table-cell>
          <table:table-cell office:value-type="string">
            <text:p>Yarablin Etat-Major 2</text:p>
          </table:table-cell>
          <table:table-cell office:value-type="string">
            <text:p>Yarablin Etat-Major 3</text:p>
          </table:table-cell>
          <table:table-cell table:number-columns-repeated="9"/>
        </table:table-row>
        <table:table-row table:style-name="ro2">
          <table:table-cell office:value-type="string">
            <text:p>Yarablin x10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Yarablin x10 1</text:p>
          </table:table-cell>
          <table:table-cell office:value-type="string">
            <text:p>Yarablin x10 2</text:p>
          </table:table-cell>
          <table:table-cell office:value-type="string">
            <text:p>Yarablin x10 3</text:p>
          </table:table-cell>
          <table:table-cell office:value-type="string">
            <text:p>Yarablin x10 4</text:p>
          </table:table-cell>
          <table:table-cell office:value-type="string">
            <text:p>Yarablin x10 5</text:p>
          </table:table-cell>
          <table:table-cell office:value-type="string">
            <text:p>Yarablin x10 6</text:p>
          </table:table-cell>
          <table:table-cell table:number-columns-repeated="6"/>
        </table:table-row>
        <table:table-row table:style-name="ro2">
          <table:table-cell office:value-type="string">
            <text:p>Roroa Khans + Yarablin Etat-Major 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 + 20X20 mm</text:p>
          </table:table-cell>
          <table:table-cell office:value-type="string">
            <text:p>50mm + 25 mm</text:p>
          </table:table-cell>
          <table:table-cell office:value-type="string">
            <text:p>Roroa Khans + Yarablin Etat-Major 1</text:p>
          </table:table-cell>
          <table:table-cell office:value-type="string">
            <text:p>Roroa Khans + Yarablin Etat-Major 2</text:p>
          </table:table-cell>
          <table:table-cell office:value-type="string">
            <text:p>Roroa Khans + Yarablin Etat-Major 3</text:p>
          </table:table-cell>
          <table:table-cell office:value-type="string">
            <text:p>Roroa Khans + Yarablin Etat-Major 4</text:p>
          </table:table-cell>
          <table:table-cell office:value-type="string">
            <text:p>Roroa Khans + Yarablin Etat-Major 5</text:p>
          </table:table-cell>
          <table:table-cell office:value-type="string">
            <text:p>Roroa Khans + Yarablin Etat-Major 6</text:p>
          </table:table-cell>
          <table:table-cell office:value-type="string">
            <text:p>Roroa Khans + Yarablin Etat-Major 7</text:p>
          </table:table-cell>
          <table:table-cell office:value-type="string">
            <text:p>Roroa Khans + Yarablin Etat-Major 8</text:p>
          </table:table-cell>
          <table:table-cell table:number-columns-repeated="4"/>
        </table:table-row>
        <table:table-row table:style-name="ro2">
          <table:table-cell office:value-type="string">
            <text:p>Roroa Khans + Yarablin x10 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40x40 mm + 20X20 mm</text:p>
          </table:table-cell>
          <table:table-cell office:value-type="string">
            <text:p>50mm + 25 mm</text:p>
          </table:table-cell>
          <table:table-cell office:value-type="string">
            <text:p>Roroa Khans + Yarablin x10 1</text:p>
          </table:table-cell>
          <table:table-cell office:value-type="string">
            <text:p>Roroa Khans + Yarablin x10 2</text:p>
          </table:table-cell>
          <table:table-cell office:value-type="string">
            <text:p>Roroa Khans + Yarablin x10 3</text:p>
          </table:table-cell>
          <table:table-cell office:value-type="string">
            <text:p>Roroa Khans + Yarablin x10 4</text:p>
          </table:table-cell>
          <table:table-cell office:value-type="string">
            <text:p>Roroa Khans + Yarablin x10 5</text:p>
          </table:table-cell>
          <table:table-cell office:value-type="string">
            <text:p>Roroa Khans + Yarablin x10 6</text:p>
          </table:table-cell>
          <table:table-cell office:value-type="string">
            <text:p>Roroa Khans + Yarablin x10 7</text:p>
          </table:table-cell>
          <table:table-cell office:value-type="string">
            <text:p>Roroa Khans + Yarablin x10 8</text:p>
          </table:table-cell>
          <table:table-cell office:value-type="string">
            <text:p>Roroa Khans + Yarablin x10 9</text:p>
          </table:table-cell>
          <table:table-cell office:value-type="string">
            <text:p>Roroa Khans + Yarablin x10 10</text:p>
          </table:table-cell>
          <table:table-cell office:value-type="string">
            <text:p>Roroa Khans + Yarablin x10 11</text:p>
          </table:table-cell>
          <table:table-cell office:value-type="string">
            <text:p>Roroa Khans + Yarablin x10 12</text:p>
          </table:table-cell>
        </table:table-row>
        <table:table-row table:style-name="ro2">
          <table:table-cell office:value-type="string">
            <text:p>Tusker x10 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Tusker x10 1</text:p>
          </table:table-cell>
          <table:table-cell office:value-type="string">
            <text:p>Tusker x10 2</text:p>
          </table:table-cell>
          <table:table-cell office:value-type="string">
            <text:p>Tusker x10 3</text:p>
          </table:table-cell>
          <table:table-cell office:value-type="string">
            <text:p>Tusker x10 4</text:p>
          </table:table-cell>
          <table:table-cell office:value-type="string">
            <text:p>Tusker x10 5</text:p>
          </table:table-cell>
          <table:table-cell office:value-type="string">
            <text:p>Tusker x10 6</text:p>
          </table:table-cell>
          <table:table-cell table:number-columns-repeated="6"/>
        </table:table-row>
        <table:table-row table:style-name="ro2">
          <table:table-cell office:value-type="string">
            <text:p>Tusker Knight x3 </text:p>
          </table:table-cell>
          <table:table-cell office:value-type="currency" office:currency="EUR" office:value="58">
            <text:p>5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Tusker Knight x3 1</text:p>
          </table:table-cell>
          <table:table-cell office:value-type="string">
            <text:p>Tusker Knight x3 2</text:p>
          </table:table-cell>
          <table:table-cell office:value-type="string">
            <text:p>Tusker Knight x3 3</text:p>
          </table:table-cell>
          <table:table-cell table:number-columns-repeated="9"/>
        </table:table-row>
        <table:table-row table:style-name="ro2">
          <table:table-cell office:value-type="string">
            <text:p>Maero Etat-Major 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Maero Etat-Major 1</text:p>
          </table:table-cell>
          <table:table-cell office:value-type="string">
            <text:p>Maero Etat-Major 2</text:p>
          </table:table-cell>
          <table:table-cell office:value-type="string">
            <text:p>Maero Etat-Major 3</text:p>
          </table:table-cell>
          <table:table-cell table:number-columns-repeated="9"/>
        </table:table-row>
        <table:table-row table:style-name="ro2">
          <table:table-cell office:value-type="string">
            <text:p>Maero x3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Maero x3 1</text:p>
          </table:table-cell>
          <table:table-cell office:value-type="string">
            <text:p>Maero x3 2</text:p>
          </table:table-cell>
          <table:table-cell office:value-type="string">
            <text:p>Maero x3 3</text:p>
          </table:table-cell>
          <table:table-cell table:number-columns-repeated="9"/>
        </table:table-row>
        <table:table-row table:style-name="ro2">
          <table:table-cell office:value-type="string">
            <text:p>Maero Hero 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Maero Hero 1</text:p>
          </table:table-cell>
          <table:table-cell office:value-type="string">
            <text:p>Maero Hero 2</text:p>
          </table:table-cell>
          <table:table-cell office:value-type="string">
            <text:p>Maero Hero 3</text:p>
          </table:table-cell>
          <table:table-cell office:value-type="string">
            <text:p>Maero Hero 4</text:p>
          </table:table-cell>
          <table:table-cell office:value-type="string">
            <text:p>Maero Hero 5</text:p>
          </table:table-cell>
          <table:table-cell office:value-type="string">
            <text:p>Maero Hero 6</text:p>
          </table:table-cell>
          <table:table-cell table:number-columns-repeated="6"/>
        </table:table-row>
        <table:table-row table:style-name="ro2">
          <table:table-cell office:value-type="string">
            <text:p>Heroine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Heroine 1</text:p>
          </table:table-cell>
          <table:table-cell office:value-type="string">
            <text:p>Heroine 2</text:p>
          </table:table-cell>
          <table:table-cell office:value-type="string">
            <text:p>Heroine 3</text:p>
          </table:table-cell>
          <table:table-cell office:value-type="string">
            <text:p>Heroine 4</text:p>
          </table:table-cell>
          <table:table-cell table:number-columns-repeated="8"/>
        </table:table-row>
        <table:table-row table:style-name="ro2">
          <table:table-cell office:value-type="string">
            <text:p>Hero 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Hero 1</text:p>
          </table:table-cell>
          <table:table-cell office:value-type="string">
            <text:p>Hero 2</text:p>
          </table:table-cell>
          <table:table-cell office:value-type="string">
            <text:p>Hero 3</text:p>
          </table:table-cell>
          <table:table-cell office:value-type="string">
            <text:p>Hero 4</text:p>
          </table:table-cell>
          <table:table-cell table:number-columns-repeated="8"/>
        </table:table-row>
        <table:table-row table:style-name="ro2">
          <table:table-cell office:value-type="string">
            <text:p>Hinewai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Hinewai 1</text:p>
          </table:table-cell>
          <table:table-cell office:value-type="string">
            <text:p>Hinewai 2</text:p>
          </table:table-cell>
          <table:table-cell office:value-type="string">
            <text:p>Hinewai 3</text:p>
          </table:table-cell>
          <table:table-cell table:number-columns-repeated="9"/>
        </table:table-row>
        <table:table-row table:style-name="ro1">
          <table:table-cell office:value-type="string">
            <text:p>Halloween 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Halloween 1</text:p>
          </table:table-cell>
          <table:table-cell office:value-type="string">
            <text:p>Halloween 2</text:p>
          </table:table-cell>
          <table:table-cell office:value-type="string">
            <text:p>Halloween 3</text:p>
          </table:table-cell>
          <table:table-cell table:number-columns-repeated="9"/>
        </table:table-row>
        <table:table-row table:style-name="ro2">
          <table:table-cell office:value-type="string">
            <text:p>Catapulte Yarablin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Catapulte Yarablin 1</text:p>
          </table:table-cell>
          <table:table-cell office:value-type="string">
            <text:p>Catapulte Yarablin 2</text:p>
          </table:table-cell>
          <table:table-cell office:value-type="string">
            <text:p>Catapulte Yarablin 3</text:p>
          </table:table-cell>
          <table:table-cell office:value-type="string">
            <text:p>Catapulte Yarablin 4</text:p>
          </table:table-cell>
          <table:table-cell office:value-type="string">
            <text:p>Catapulte Yarablin 5</text:p>
          </table:table-cell>
          <table:table-cell office:value-type="string">
            <text:p>Catapulte Yarablin 6</text:p>
          </table:table-cell>
          <table:table-cell table:number-columns-repeated="6"/>
        </table:table-row>
        <table:table-row table:style-name="ro2">
          <table:table-cell office:value-type="string">
            <text:p>Canon Yarablin 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Canon Yarablin 1</text:p>
          </table:table-cell>
          <table:table-cell office:value-type="string">
            <text:p>Canon Yarablin 2</text:p>
          </table:table-cell>
          <table:table-cell office:value-type="string">
            <text:p>Canon Yarablin 3</text:p>
          </table:table-cell>
          <table:table-cell office:value-type="string">
            <text:p>Canon Yarablin 4</text:p>
          </table:table-cell>
          <table:table-cell table:number-columns-repeated="8"/>
        </table:table-row>
        <table:table-row table:style-name="ro2">
          <table:table-cell office:value-type="string">
            <text:p>Bunyip Hero 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100x150 mm</text:p>
          </table:table-cell>
          <table:table-cell/>
          <table:table-cell office:value-type="string">
            <text:p>Bunyip Hero 1</text:p>
          </table:table-cell>
          <table:table-cell office:value-type="string">
            <text:p>Bunyip Hero 2</text:p>
          </table:table-cell>
          <table:table-cell office:value-type="string">
            <text:p>Bunyip Hero 3</text:p>
          </table:table-cell>
          <table:table-cell table:number-columns-repeated="9"/>
        </table:table-row>
        <table:table-row table:style-name="ro2">
          <table:table-cell office:value-type="string">
            <text:p>Burrunjor </text:p>
          </table:table-cell>
          <table:table-cell office:value-type="currency" office:currency="EUR" office:value="55">
            <text:p>55,00 €</text:p>
          </table:table-cell>
          <table:table-cell office:value-type="string">
            <text:p>100x150 mm</text:p>
          </table:table-cell>
          <table:table-cell/>
          <table:table-cell office:value-type="string">
            <text:p>Burrunjor 1</text:p>
          </table:table-cell>
          <table:table-cell office:value-type="string">
            <text:p>Burrunjor 2</text:p>
          </table:table-cell>
          <table:table-cell office:value-type="string">
            <text:p>Burrunjor 3</text:p>
          </table:table-cell>
          <table:table-cell table:number-columns-repeated="9"/>
        </table:table-row>
        <table:table-row table:style-name="ro2">
          <table:table-cell office:value-type="string">
            <text:p>Taniwha </text:p>
          </table:table-cell>
          <table:table-cell office:value-type="currency" office:currency="EUR" office:value="75">
            <text:p>75,00 €</text:p>
          </table:table-cell>
          <table:table-cell office:value-type="string">
            <text:p>100x150 mm</text:p>
          </table:table-cell>
          <table:table-cell/>
          <table:table-cell office:value-type="string">
            <text:p>Taniwha 1</text:p>
          </table:table-cell>
          <table:table-cell office:value-type="string">
            <text:p>Taniwha 2</text:p>
          </table:table-cell>
          <table:table-cell office:value-type="string">
            <text:p>Taniwha 3</text:p>
          </table:table-cell>
          <table:table-cell table:number-columns-repeated="9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Titan 4</text:p>
          </table:table-cell>
          <table:table-cell table:number-columns-repeated="8"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6">16/06/2026</text:date>, <text:time>20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16T20:54:22.56</dc:date>
    <dc:creator>Ycham Bounouar</dc:creator>
    <meta:editing-duration>PT1H30M4S</meta:editing-duration>
    <meta:editing-cycles>6</meta:editing-cycles>
    <meta:document-statistic meta:table-count="1" meta:cell-count="169" meta:object-count="0"/>
  </office:meta>
</office:document-meta>
</file>