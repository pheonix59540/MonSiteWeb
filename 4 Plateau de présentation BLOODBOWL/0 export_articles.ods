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1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cheerleaders</text:p>
          </table:table-cell>
          <table:table-cell office:value-type="string">
            <text:p>big_guy</text:p>
          </table:table-cell>
          <table:table-cell office:value-type="string">
            <text:p>joueurs</text:p>
          </table:table-cell>
          <table:table-cell office:value-type="string">
            <text:p>Opt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  <table:table-cell/>
        </table:table-row>
        <table:table-row table:style-name="ro2">
          <table:table-cell office:value-type="string">
            <text:p>Plateau 15 joueurs + 2 Bigs guys + Cheerleaders </text:p>
          </table:table-cell>
          <table:table-cell office:value-type="currency" office:currency="EUR" office:value="19.52">
            <text:p>19,52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ans</text:p>
          </table:table-cell>
          <table:table-cell office:value-type="string">
            <text:p>Plateau 15 joueurs + 2 Bigs guys + Cheerleaders 1</text:p>
          </table:table-cell>
          <table:table-cell office:value-type="string">
            <text:p>Plateau 15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5 joueurs + 2 Bigs guys + Cheerleaders </text:p>
          </table:table-cell>
          <table:table-cell office:value-type="currency" office:currency="EUR" office:value="51.72">
            <text:p>51,72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vec</text:p>
          </table:table-cell>
          <table:table-cell office:value-type="string">
            <text:p>Plateau 15 joueurs + 2 Bigs guys + Cheerleaders 1</text:p>
          </table:table-cell>
          <table:table-cell office:value-type="string">
            <text:p>Plateau 15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6 joueurs + 1 Big guy + Cheerleaders </text:p>
          </table:table-cell>
          <table:table-cell office:value-type="currency" office:currency="EUR" office:value="17.32">
            <text:p>17,32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sans</text:p>
          </table:table-cell>
          <table:table-cell office:value-type="string">
            <text:p>Plateau 16 joueurs + 1 Big guy + Cheerleaders 1</text:p>
          </table:table-cell>
          <table:table-cell office:value-type="string">
            <text:p>Plateau 16 joueurs + 1 Big guy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6 joueurs + 1 Big guy + Cheerleaders </text:p>
          </table:table-cell>
          <table:table-cell office:value-type="currency" office:currency="EUR" office:value="49.06">
            <text:p>49,06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avec</text:p>
          </table:table-cell>
          <table:table-cell office:value-type="string">
            <text:p>Plateau 16 joueurs + 1 Big guy + Cheerleaders 1</text:p>
          </table:table-cell>
          <table:table-cell office:value-type="string">
            <text:p>Plateau 16 joueurs + 1 Big guy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7 joueurs + 1 Big guy + Cheerleaders </text:p>
          </table:table-cell>
          <table:table-cell office:value-type="currency" office:currency="EUR" office:value="17.83">
            <text:p>17,83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sans</text:p>
          </table:table-cell>
          <table:table-cell office:value-type="string">
            <text:p>Plateau 17 joueurs + 1 Big guy + Cheerleaders 1</text:p>
          </table:table-cell>
          <table:table-cell office:value-type="string">
            <text:p>Plateau 17 joueurs + 1 Big guy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7 joueurs + 1 Big guy + Cheerleaders </text:p>
          </table:table-cell>
          <table:table-cell office:value-type="currency" office:currency="EUR" office:value="51.41">
            <text:p>51,41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vec</text:p>
          </table:table-cell>
          <table:table-cell office:value-type="string">
            <text:p>Plateau 17 joueurs + 1 Big guy + Cheerleaders 1</text:p>
          </table:table-cell>
          <table:table-cell office:value-type="string">
            <text:p>Plateau 17 joueurs + 1 Big guy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6 joueurs + 2 Bigs guys + Cheerleaders </text:p>
          </table:table-cell>
          <table:table-cell office:value-type="currency" office:currency="EUR" office:value="17.87">
            <text:p>17,87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ans</text:p>
          </table:table-cell>
          <table:table-cell office:value-type="string">
            <text:p>Plateau 16 joueurs + 2 Bigs guys + Cheerleaders 1</text:p>
          </table:table-cell>
          <table:table-cell office:value-type="string">
            <text:p>Plateau 16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16 joueurs + 2 Bigs guys + Cheerleaders </text:p>
          </table:table-cell>
          <table:table-cell office:value-type="currency" office:currency="EUR" office:value="51.91">
            <text:p>51,91 €</text:p>
          </table:table-cell>
          <table:table-cell office:value-type="string">
            <text:p>200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vec</text:p>
          </table:table-cell>
          <table:table-cell office:value-type="string">
            <text:p>Plateau 16 joueurs + 2 Bigs guys + Cheerleaders 1</text:p>
          </table:table-cell>
          <table:table-cell office:value-type="string">
            <text:p>Plateau 16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22 joueurs + 2 Bigs guys + Cheerleaders </text:p>
          </table:table-cell>
          <table:table-cell office:value-type="currency" office:currency="EUR" office:value="22.18">
            <text:p>22,18 €</text:p>
          </table:table-cell>
          <table:table-cell office:value-type="string">
            <text:p>245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sans</text:p>
          </table:table-cell>
          <table:table-cell office:value-type="string">
            <text:p>Plateau 22 joueurs + 2 Bigs guys + Cheerleaders 1</text:p>
          </table:table-cell>
          <table:table-cell office:value-type="string">
            <text:p>Plateau 22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22 joueurs + 2 Bigs guys + Cheerleaders </text:p>
          </table:table-cell>
          <table:table-cell office:value-type="currency" office:currency="EUR" office:value="67.26">
            <text:p>67,26 €</text:p>
          </table:table-cell>
          <table:table-cell office:value-type="string">
            <text:p>245 x 340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avec</text:p>
          </table:table-cell>
          <table:table-cell office:value-type="string">
            <text:p>Plateau 22 joueurs + 2 Bigs guys + Cheerleaders 1</text:p>
          </table:table-cell>
          <table:table-cell office:value-type="string">
            <text:p>Plateau 22 joueurs + 2 Bigs guys + Cheerleaders 2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  <table:table-cell/>
        </table:table-row>
        <table:table-row table:style-name="ro2">
          <table:table-cell office:value-type="string">
            <text:p>Plateau 21 joueurs + 4 Bigs guys + Cheerleaders </text:p>
          </table:table-cell>
          <table:table-cell office:value-type="currency" office:currency="EUR" office:value="22.77">
            <text:p>22,77 €</text:p>
          </table:table-cell>
          <table:table-cell office:value-type="string">
            <text:p>245 x 340m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ans</text:p>
          </table:table-cell>
          <table:table-cell office:value-type="string">
            <text:p>Plateau 21 joueurs + 4 Bigs guys + Cheerleaders 1</text:p>
          </table:table-cell>
          <table:table-cell office:value-type="string">
            <text:p>Plateau 21 joueurs + 4 Bigs guys + Cheerleaders 2</text:p>
          </table:table-cell>
          <table:table-cell office:value-type="string">
            <text:p>Plateau 21 joueurs + 4 Bigs guys + Cheerleaders 3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</table:table-row>
        <table:table-row table:style-name="ro2">
          <table:table-cell office:value-type="string">
            <text:p>Plateau 21 joueurs + 4 Bigs guys + Cheerleaders </text:p>
          </table:table-cell>
          <table:table-cell office:value-type="currency" office:currency="EUR" office:value="70.61">
            <text:p>70,61 €</text:p>
          </table:table-cell>
          <table:table-cell office:value-type="string">
            <text:p>245 x 340m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avec</text:p>
          </table:table-cell>
          <table:table-cell office:value-type="string">
            <text:p>Plateau 21 joueurs + 4 Bigs guys + Cheerleaders 1</text:p>
          </table:table-cell>
          <table:table-cell office:value-type="string">
            <text:p>Plateau 21 joueurs + 4 Bigs guys + Cheerleaders 2</text:p>
          </table:table-cell>
          <table:table-cell office:value-type="string">
            <text:p>Plateau 21 joueurs + 4 Bigs guys + Cheerleaders 3</text:p>
          </table:table-cell>
          <table:table-cell office:value-type="string">
            <text:p>Exemple 1</text:p>
          </table:table-cell>
          <table:table-cell office:value-type="string">
            <text:p>Exemple 2</text:p>
          </table:table-cell>
          <table:table-cell office:value-type="string">
            <text:p>Exemple 3</text:p>
          </table:table-cell>
          <table:table-cell office:value-type="string">
            <text:p>Exemple 4</text:p>
          </table:table-cell>
          <table:table-cell office:value-type="string">
            <text:p>Exemple 5</text:p>
          </table:table-cell>
          <table:table-cell office:value-type="string">
            <text:p>Exemple 6</text:p>
          </table:table-cell>
        </table:table-row>
        <table:table-row table:style-name="ro2">
          <table:table-cell table:number-columns-repeated="16"/>
        </table:table-row>
        <table:table-row table:style-name="ro2" table:number-rows-repeated="12">
          <table:table-cell/>
          <table:table-cell table:style-name="Default"/>
          <table:table-cell table:number-columns-repeated="14"/>
        </table:table-row>
        <table:table-row table:style-name="ro2" table:number-rows-repeated="1048549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7">27/06/2026</text:date>, <text:time>22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7T22:51:55.91</dc:date>
    <dc:creator>Ycham Bounouar</dc:creator>
    <meta:editing-duration>PT4H7M15S</meta:editing-duration>
    <meta:editing-cycles>37</meta:editing-cycles>
    <meta:document-statistic meta:table-count="1" meta:cell-count="197" meta:object-count="0"/>
  </office:meta>
</office:document-meta>
</file>