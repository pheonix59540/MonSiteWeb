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2">
          <table:table-cell office:value-type="string">
            <text:p>Cementery Ruins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Lot</text:p>
          </table:table-cell>
          <table:table-cell office:value-type="string">
            <text:p>Cementery Ruins 1</text:p>
          </table:table-cell>
          <table:table-cell office:value-type="string">
            <text:p>Cementery Ruins 2</text:p>
          </table:table-cell>
          <table:table-cell table:number-columns-repeated="4"/>
        </table:table-row>
        <table:table-row table:style-name="ro2">
          <table:table-cell office:value-type="string">
            <text:p>Ruined Church</text:p>
          </table:table-cell>
          <table:table-cell office:value-type="currency" office:currency="EUR" office:value="80">
            <text:p>80,00 €</text:p>
          </table:table-cell>
          <table:table-cell office:value-type="string">
            <text:p>37x38x20 cm</text:p>
          </table:table-cell>
          <table:table-cell office:value-type="string">
            <text:p>Ruined Church 1</text:p>
          </table:table-cell>
          <table:table-cell office:value-type="string">
            <text:p>Ruined Church 2</text:p>
          </table:table-cell>
          <table:table-cell office:value-type="string">
            <text:p>Ruined Church 3</text:p>
          </table:table-cell>
          <table:table-cell office:value-type="string">
            <text:p>Ruined Church 4</text:p>
          </table:table-cell>
          <table:table-cell table:number-columns-repeated="2"/>
        </table:table-row>
        <table:table-row table:style-name="ro2">
          <table:table-cell office:value-type="string">
            <text:p>Church Corne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17x17x10 cm</text:p>
          </table:table-cell>
          <table:table-cell office:value-type="string">
            <text:p>Church Corner 1</text:p>
          </table:table-cell>
          <table:table-cell office:value-type="string">
            <text:p>Church Corner 2</text:p>
          </table:table-cell>
          <table:table-cell office:value-type="string">
            <text:p>Church Corner 3</text:p>
          </table:table-cell>
          <table:table-cell table:number-columns-repeated="3"/>
        </table:table-row>
        <table:table-row table:style-name="ro2">
          <table:table-cell office:value-type="string">
            <text:p>Ruined Tower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17x17x20 cm</text:p>
          </table:table-cell>
          <table:table-cell office:value-type="string">
            <text:p>Ruined Tower 1</text:p>
          </table:table-cell>
          <table:table-cell office:value-type="string">
            <text:p>Ruined Tower 3</text:p>
          </table:table-cell>
          <table:table-cell office:value-type="string">
            <text:p>Ruined Tower 2</text:p>
          </table:table-cell>
          <table:table-cell table:number-columns-repeated="3"/>
        </table:table-row>
        <table:table-row table:style-name="ro2">
          <table:table-cell office:value-type="string">
            <text:p>Ruined Walls</text:p>
          </table:table-cell>
          <table:table-cell office:value-type="currency" office:currency="EUR" office:value="27">
            <text:p>27,00 €</text:p>
          </table:table-cell>
          <table:table-cell office:value-type="string">
            <text:p>Lot</text:p>
          </table:table-cell>
          <table:table-cell office:value-type="string">
            <text:p>Ruined Walls 1</text:p>
          </table:table-cell>
          <table:table-cell office:value-type="string">
            <text:p>Ruined Walls 2</text:p>
          </table:table-cell>
          <table:table-cell office:value-type="string">
            <text:p>Ruined Walls 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7">27/03/2026</text:date>, <text:time>22:1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3-27T22:12:20.48</dc:date>
    <dc:creator>Ycham Bounouar</dc:creator>
    <meta:editing-duration>PT37M52S</meta:editing-duration>
    <meta:editing-cycles>8</meta:editing-cycles>
    <meta:document-statistic meta:table-count="1" meta:cell-count="39" meta:object-count="0"/>
  </office:meta>
</office:document-meta>
</file>