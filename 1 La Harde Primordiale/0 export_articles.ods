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6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Photo 7</text:p>
          </table:table-cell>
          <table:table-cell office:value-type="string">
            <text:p>Photo 8</text:p>
          </table:table-cell>
          <table:table-cell office:value-type="string">
            <text:p>Photo 9</text:p>
          </table:table-cell>
          <table:table-cell office:value-type="string">
            <text:p>Photo 10</text:p>
          </table:table-cell>
          <table:table-cell office:value-type="string">
            <text:p>Photo 11</text:p>
          </table:table-cell>
          <table:table-cell office:value-type="string">
            <text:p>Photo 12</text:p>
          </table:table-cell>
        </table:table-row>
        <table:table-row table:style-name="ro2">
          <table:table-cell office:value-type="string">
            <text:p>Mongrels Etat-Major 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x32 mm</text:p>
          </table:table-cell>
          <table:table-cell office:value-type="string">
            <text:p>Mongrels Etat-Major 1</text:p>
          </table:table-cell>
          <table:table-cell office:value-type="string">
            <text:p>Mongrels Etat-Major 2</text:p>
          </table:table-cell>
          <table:table-cell office:value-type="string">
            <text:p>Mongrels Etat-Major 3</text:p>
          </table:table-cell>
          <table:table-cell table:number-columns-repeated="9"/>
        </table:table-row>
        <table:table-row table:style-name="ro2">
          <table:table-cell office:value-type="string">
            <text:p>Mongrels x10 </text:p>
          </table:table-cell>
          <table:table-cell office:value-type="currency" office:currency="EUR" office:value="9.5">
            <text:p>9,50 €</text:p>
          </table:table-cell>
          <table:table-cell office:value-type="string">
            <text:p>25x25 mm</text:p>
          </table:table-cell>
          <table:table-cell office:value-type="string">
            <text:p>32x32 mm</text:p>
          </table:table-cell>
          <table:table-cell office:value-type="string">
            <text:p>Mongrels x10 1</text:p>
          </table:table-cell>
          <table:table-cell office:value-type="string">
            <text:p>Mongrels x10 2</text:p>
          </table:table-cell>
          <table:table-cell office:value-type="string">
            <text:p>Mongrels x10 3</text:p>
          </table:table-cell>
          <table:table-cell office:value-type="string">
            <text:p>Mongrels x10 4</text:p>
          </table:table-cell>
          <table:table-cell office:value-type="string">
            <text:p>Mongrels x10 5</text:p>
          </table:table-cell>
          <table:table-cell table:number-columns-repeated="7"/>
        </table:table-row>
        <table:table-row table:style-name="ro2">
          <table:table-cell office:value-type="string">
            <text:p>Warhound 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Warhound 1</text:p>
          </table:table-cell>
          <table:table-cell office:value-type="string">
            <text:p>Warhound 2</text:p>
          </table:table-cell>
          <table:table-cell office:value-type="string">
            <text:p>Warhound 3</text:p>
          </table:table-cell>
          <table:table-cell table:number-columns-repeated="9"/>
        </table:table-row>
        <table:table-row table:style-name="ro2">
          <table:table-cell office:value-type="string">
            <text:p>Infanterie x10 Etat-Major 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x32 mm</text:p>
          </table:table-cell>
          <table:table-cell office:value-type="string">
            <text:p>Infanterie x10 Etat-Major 1</text:p>
          </table:table-cell>
          <table:table-cell office:value-type="string">
            <text:p>Infanterie x10 Etat-Major 2</text:p>
          </table:table-cell>
          <table:table-cell office:value-type="string">
            <text:p>Infanterie x10 Etat-Major 3</text:p>
          </table:table-cell>
          <table:table-cell table:number-columns-repeated="9"/>
        </table:table-row>
        <table:table-row table:style-name="ro1">
          <table:table-cell office:value-type="string">
            <text:p>Infanterie x10 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25x25 mm</text:p>
          </table:table-cell>
          <table:table-cell office:value-type="string">
            <text:p>32x32 mm</text:p>
          </table:table-cell>
          <table:table-cell office:value-type="string">
            <text:p>Infanterie x10 1</text:p>
          </table:table-cell>
          <table:table-cell office:value-type="string">
            <text:p>Infanterie x10 2</text:p>
          </table:table-cell>
          <table:table-cell office:value-type="string">
            <text:p>Infanterie x10 3</text:p>
          </table:table-cell>
          <table:table-cell office:value-type="string">
            <text:p>Infanterie x10 4</text:p>
          </table:table-cell>
          <table:table-cell office:value-type="string">
            <text:p>Infanterie x10 5</text:p>
          </table:table-cell>
          <table:table-cell office:value-type="string">
            <text:p>Infanterie x10 6</text:p>
          </table:table-cell>
          <table:table-cell table:number-columns-repeated="6"/>
        </table:table-row>
        <table:table-row table:style-name="ro1">
          <table:table-cell office:value-type="string">
            <text:p>Hunter 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x32 mm</text:p>
          </table:table-cell>
          <table:table-cell office:value-type="string">
            <text:p>Hunter 1</text:p>
          </table:table-cell>
          <table:table-cell office:value-type="string">
            <text:p>Hunter 2</text:p>
          </table:table-cell>
          <table:table-cell office:value-type="string">
            <text:p>Hunter 3</text:p>
          </table:table-cell>
          <table:table-cell office:value-type="string">
            <text:p>Hunter 4</text:p>
          </table:table-cell>
          <table:table-cell office:value-type="string">
            <text:p>Hunter 5</text:p>
          </table:table-cell>
          <table:table-cell office:value-type="string">
            <text:p>Hunter 6</text:p>
          </table:table-cell>
          <table:table-cell office:value-type="string">
            <text:p>Hunter 7</text:p>
          </table:table-cell>
          <table:table-cell table:number-columns-repeated="5"/>
        </table:table-row>
        <table:table-row table:style-name="ro2">
          <table:table-cell office:value-type="string">
            <text:p>Centaurs Etat-Major 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Centaurs Etat-Major 1</text:p>
          </table:table-cell>
          <table:table-cell office:value-type="string">
            <text:p>Centaurs Etat-Major 2</text:p>
          </table:table-cell>
          <table:table-cell office:value-type="string">
            <text:p>Centaurs Etat-Major 3</text:p>
          </table:table-cell>
          <table:table-cell table:number-columns-repeated="9"/>
        </table:table-row>
        <table:table-row table:style-name="ro2">
          <table:table-cell office:value-type="string">
            <text:p>Centaurs x5 </text:p>
          </table:table-cell>
          <table:table-cell office:value-type="currency" office:currency="EUR" office:value="17.5">
            <text:p>17,5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Centaurs x5 1</text:p>
          </table:table-cell>
          <table:table-cell office:value-type="string">
            <text:p>Centaurs x5 2</text:p>
          </table:table-cell>
          <table:table-cell office:value-type="string">
            <text:p>Centaurs x5 3</text:p>
          </table:table-cell>
          <table:table-cell table:number-columns-repeated="9"/>
        </table:table-row>
        <table:table-row table:style-name="ro2">
          <table:table-cell office:value-type="string">
            <text:p>Centaurs Hero 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Centaurs Hero 1</text:p>
          </table:table-cell>
          <table:table-cell office:value-type="string">
            <text:p>Centaurs Hero 2</text:p>
          </table:table-cell>
          <table:table-cell office:value-type="string">
            <text:p>Centaurs Hero 3</text:p>
          </table:table-cell>
          <table:table-cell office:value-type="string">
            <text:p>Centaurs Hero 4</text:p>
          </table:table-cell>
          <table:table-cell table:number-columns-repeated="8"/>
        </table:table-row>
        <table:table-row table:style-name="ro2">
          <table:table-cell office:value-type="string">
            <text:p>Un hero sur char 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50x100 mm</text:p>
          </table:table-cell>
          <table:table-cell office:value-type="string">
            <text:p>92x120 mm</text:p>
          </table:table-cell>
          <table:table-cell office:value-type="string">
            <text:p>Un hero sur char 1</text:p>
          </table:table-cell>
          <table:table-cell office:value-type="string">
            <text:p>Un hero sur char 2</text:p>
          </table:table-cell>
          <table:table-cell office:value-type="string">
            <text:p>Un hero sur char 3</text:p>
          </table:table-cell>
          <table:table-cell office:value-type="string">
            <text:p>Un hero sur char 4</text:p>
          </table:table-cell>
          <table:table-cell office:value-type="string">
            <text:p>Un hero sur char 5</text:p>
          </table:table-cell>
          <table:table-cell office:value-type="string">
            <text:p>Un hero sur char 6</text:p>
          </table:table-cell>
          <table:table-cell office:value-type="string">
            <text:p>Un hero sur char 7</text:p>
          </table:table-cell>
          <table:table-cell table:number-columns-repeated="5"/>
        </table:table-row>
        <table:table-row table:style-name="ro1">
          <table:table-cell office:value-type="string">
            <text:p>Char 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100 mm</text:p>
          </table:table-cell>
          <table:table-cell office:value-type="string">
            <text:p>92x120 mm</text:p>
          </table:table-cell>
          <table:table-cell office:value-type="string">
            <text:p>Char 1</text:p>
          </table:table-cell>
          <table:table-cell office:value-type="string">
            <text:p>Char 2</text:p>
          </table:table-cell>
          <table:table-cell office:value-type="string">
            <text:p>Char 3</text:p>
          </table:table-cell>
          <table:table-cell office:value-type="string">
            <text:p>Char 4</text:p>
          </table:table-cell>
          <table:table-cell office:value-type="string">
            <text:p>Char 5</text:p>
          </table:table-cell>
          <table:table-cell table:number-columns-repeated="7"/>
        </table:table-row>
        <table:table-row table:style-name="ro2">
          <table:table-cell office:value-type="string">
            <text:p>Gentilak </text:p>
          </table:table-cell>
          <table:table-cell office:value-type="currency" office:currency="EUR" office:value="62">
            <text:p>62,00 €</text:p>
          </table:table-cell>
          <table:table-cell office:value-type="string">
            <text:p>100x100 mm</text:p>
          </table:table-cell>
          <table:table-cell office:value-type="string">
            <text:p>120 mm</text:p>
          </table:table-cell>
          <table:table-cell office:value-type="string">
            <text:p>Gentilak 1</text:p>
          </table:table-cell>
          <table:table-cell office:value-type="string">
            <text:p>Gentilak 2</text:p>
          </table:table-cell>
          <table:table-cell office:value-type="string">
            <text:p>Gentilak 3</text:p>
          </table:table-cell>
          <table:table-cell office:value-type="string">
            <text:p>Gentilak 4</text:p>
          </table:table-cell>
          <table:table-cell table:number-columns-repeated="8"/>
        </table:table-row>
        <table:table-row table:style-name="ro2">
          <table:table-cell office:value-type="string">
            <text:p>Dragon </text:p>
          </table:table-cell>
          <table:table-cell office:value-type="currency" office:currency="EUR" office:value="58">
            <text:p>58,00 €</text:p>
          </table:table-cell>
          <table:table-cell office:value-type="string">
            <text:p>100x100 mm</text:p>
          </table:table-cell>
          <table:table-cell office:value-type="string">
            <text:p>120 mm</text:p>
          </table:table-cell>
          <table:table-cell office:value-type="string">
            <text:p>Dragon 1</text:p>
          </table:table-cell>
          <table:table-cell office:value-type="string">
            <text:p>Dragon 2</text:p>
          </table:table-cell>
          <table:table-cell office:value-type="string">
            <text:p>Dragon 3</text:p>
          </table:table-cell>
          <table:table-cell office:value-type="string">
            <text:p>Dragon 4</text:p>
          </table:table-cell>
          <table:table-cell table:number-columns-repeated="6"/>
          <table:table-cell office:value-type="string">
            <text:p>Roroa Khans + Yarablin x10 11</text:p>
          </table:table-cell>
          <table:table-cell office:value-type="string">
            <text:p>Roroa Khans + Yarablin x10 12</text:p>
          </table:table-cell>
        </table:table-row>
        <table:table-row table:style-name="ro1" table:number-rows-repeated="28"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Titan 4</text:p>
          </table:table-cell>
          <table:table-cell table:number-columns-repeated="8"/>
        </table:table-row>
        <table:table-row table:style-name="ro1" table:number-rows-repeated="1048532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6">26/06/2026</text:date>, <text:time>22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6-26T22:19:25.85</dc:date>
    <dc:creator>Ycham Bounouar</dc:creator>
    <meta:editing-duration>PT2H33M56S</meta:editing-duration>
    <meta:editing-cycles>18</meta:editing-cycles>
    <meta:document-statistic meta:table-count="1" meta:cell-count="128" meta:object-count="0"/>
  </office:meta>
</office:document-meta>
</file>