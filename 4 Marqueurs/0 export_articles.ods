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</table:table-row>
        <table:table-row table:style-name="ro2">
          <table:table-cell office:value-type="string">
            <text:p>BLOODBOWL Coins Prone &amp; Sunned Special Edition des Loups Leucquois 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38 x 6mm</text:p>
          </table:table-cell>
          <table:table-cell office:value-type="string">
            <text:p>BLOODBOWL Coins Prone &amp; Sunned Special Edition des Loups Leucquois 1</text:p>
          </table:table-cell>
          <table:table-cell office:value-type="string">
            <text:p>BLOODBOWL Coins Prone &amp; Sunned Special Edition des Loups Leucquois 2</text:p>
          </table:table-cell>
          <table:table-cell table:number-columns-repeated="6"/>
        </table:table-row>
        <table:table-row table:style-name="ro2" table:number-rows-repeated="1048573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8">18/06/2026</text:date>, <text:time>20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8T20:12:06.47</dc:date>
    <dc:creator>Ycham Bounouar</dc:creator>
    <meta:editing-duration>PT1H58M29S</meta:editing-duration>
    <meta:editing-cycles>24</meta:editing-cycles>
    <meta:document-statistic meta:table-count="1" meta:cell-count="16" meta:object-count="0"/>
  </office:meta>
</office:document-meta>
</file>