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1">
          <table:table-cell office:value-type="string">
            <text:p>BLOODBOWL Coins Prone &amp; Sunned Special Edition des Loups Leucquois 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38 x 6mm</text:p>
          </table:table-cell>
          <table:table-cell office:value-type="string">
            <text:p>BLOODBOWL Coins Prone &amp; Sunned Special Edition des Loups Leucquois 1</text:p>
          </table:table-cell>
          <table:table-cell office:value-type="string">
            <text:p>BLOODBOWL Coins Prone &amp; Sunned Special Edition des Loups Leucquois 2</text:p>
          </table:table-cell>
          <table:table-cell table:number-columns-repeated="6"/>
        </table:table-row>
        <table:table-row table:style-name="ro1">
          <table:table-cell office:value-type="string">
            <text:p>Compteur de point de vie 32mm 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46 x 6mm</text:p>
          </table:table-cell>
          <table:table-cell office:value-type="string">
            <text:p>Compteur de point de vie 32mm 1</text:p>
          </table:table-cell>
          <table:table-cell office:value-type="string">
            <text:p>Compteur de point de vie 32mm 2</text:p>
          </table:table-cell>
          <table:table-cell office:value-type="string">
            <text:p>Compteur de point de vie 32mm 3</text:p>
          </table:table-cell>
          <table:table-cell office:value-type="string">
            <text:p>Compteur de point de vie 32mm 4</text:p>
          </table:table-cell>
          <table:table-cell office:value-type="string">
            <text:p>Compteur de point de vie 32mm 5</text:p>
          </table:table-cell>
          <table:table-cell office:value-type="string">
            <text:p>Compteur de point de vie 32mm 6</text:p>
          </table:table-cell>
          <table:table-cell office:value-type="string">
            <text:p>Compteur de point de vie 32mm 7</text:p>
          </table:table-cell>
          <table:table-cell office:value-type="string">
            <text:p>Compteur de point de vie 32mm 8</text:p>
          </table:table-cell>
        </table:table-row>
        <table:table-row table:style-name="ro1">
          <table:table-cell office:value-type="string">
            <text:p>Compteur de point de vie 40mm </text:p>
          </table:table-cell>
          <table:table-cell office:value-type="currency" office:currency="EUR" office:value="2.5">
            <text:p>2,50 €</text:p>
          </table:table-cell>
          <table:table-cell office:value-type="string">
            <text:p>54 x 6mm</text:p>
          </table:table-cell>
          <table:table-cell office:value-type="string">
            <text:p>Compteur de point de vie 40mm 1</text:p>
          </table:table-cell>
          <table:table-cell office:value-type="string">
            <text:p>Compteur de point de vie 40mm 2</text:p>
          </table:table-cell>
          <table:table-cell office:value-type="string">
            <text:p>Compteur de point de vie 40mm 3</text:p>
          </table:table-cell>
          <table:table-cell office:value-type="string">
            <text:p>Compteur de point de vie 40mm 4</text:p>
          </table:table-cell>
          <table:table-cell office:value-type="string">
            <text:p>Compteur de point de vie 40mm 5</text:p>
          </table:table-cell>
          <table:table-cell office:value-type="string">
            <text:p>Compteur de point de vie 40mm 6</text:p>
          </table:table-cell>
          <table:table-cell office:value-type="string">
            <text:p>Compteur de point de vie 40mm 7</text:p>
          </table:table-cell>
          <table:table-cell office:value-type="string">
            <text:p>Compteur de point de vie 40mm 8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7">27/06/2026</text:date>, <text:time>16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7T16:14:58.65</dc:date>
    <dc:creator>Ycham Bounouar</dc:creator>
    <meta:editing-duration>PT2H19M9S</meta:editing-duration>
    <meta:editing-cycles>25</meta:editing-cycles>
    <meta:document-statistic meta:table-count="1" meta:cell-count="38" meta:object-count="0"/>
  </office:meta>
</office:document-meta>
</file>