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4.417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Réglette 3 pouces en MDF</text:p>
          </table:table-cell>
          <table:table-cell office:value-type="currency" office:currency="EUR" office:value="0.4">
            <text:p>0,40 €</text:p>
          </table:table-cell>
          <table:table-cell office:value-type="string">
            <text:p>3 pouces</text:p>
          </table:table-cell>
          <table:table-cell office:value-type="string">
            <text:p>Réglette 3 pouces en MDF 1</text:p>
          </table:table-cell>
          <table:table-cell table:number-columns-repeated="5"/>
        </table:table-row>
        <table:table-row table:style-name="ro1">
          <table:table-cell office:value-type="string">
            <text:p>Réglette 3 pouces en MDF Magnétique</text:p>
          </table:table-cell>
          <table:table-cell office:value-type="currency" office:currency="EUR" office:value="1.05">
            <text:p>1,05 €</text:p>
          </table:table-cell>
          <table:table-cell office:value-type="string">
            <text:p>3 pouces</text:p>
          </table:table-cell>
          <table:table-cell office:value-type="string">
            <text:p>Réglette 3 pouces en MDF Magnétique 1</text:p>
          </table:table-cell>
          <table:table-cell table:number-columns-repeated="5"/>
        </table:table-row>
        <table:table-row table:style-name="ro1">
          <table:table-cell office:value-type="string">
            <text:p>Réglette 3 pouces en PMMA</text:p>
          </table:table-cell>
          <table:table-cell office:value-type="currency" office:currency="EUR" office:value="1.63">
            <text:p>1,63 €</text:p>
          </table:table-cell>
          <table:table-cell office:value-type="string">
            <text:p>3 pouces</text:p>
          </table:table-cell>
          <table:table-cell office:value-type="string">
            <text:p>Réglette 3 pouces en PMMA 1</text:p>
          </table:table-cell>
          <table:table-cell table:number-columns-repeated="5"/>
        </table:table-row>
        <table:table-row table:style-name="ro1">
          <table:table-cell office:value-type="string">
            <text:p>Réglette 6 pouces en MDF</text:p>
          </table:table-cell>
          <table:table-cell office:value-type="currency" office:currency="EUR" office:value="0.8">
            <text:p>0,80 €</text:p>
          </table:table-cell>
          <table:table-cell office:value-type="string">
            <text:p>6 pouces</text:p>
          </table:table-cell>
          <table:table-cell office:value-type="string">
            <text:p>Réglette 6 pouces en MDF 1</text:p>
          </table:table-cell>
          <table:table-cell table:number-columns-repeated="5"/>
        </table:table-row>
        <table:table-row table:style-name="ro1">
          <table:table-cell office:value-type="string">
            <text:p>Réglette 6 pouces en MDF Magnétique</text:p>
          </table:table-cell>
          <table:table-cell office:value-type="currency" office:currency="EUR" office:value="2.1">
            <text:p>2,10 €</text:p>
          </table:table-cell>
          <table:table-cell office:value-type="string">
            <text:p>6 pouces</text:p>
          </table:table-cell>
          <table:table-cell office:value-type="string">
            <text:p>Réglette 6 pouces en MDF Magnétique 1</text:p>
          </table:table-cell>
          <table:table-cell table:number-columns-repeated="5"/>
        </table:table-row>
        <table:table-row table:style-name="ro1">
          <table:table-cell office:value-type="string">
            <text:p>Réglette 6 pouces en PMMA</text:p>
          </table:table-cell>
          <table:table-cell office:value-type="currency" office:currency="EUR" office:value="2.37">
            <text:p>2,37 €</text:p>
          </table:table-cell>
          <table:table-cell office:value-type="string">
            <text:p>6 pouces</text:p>
          </table:table-cell>
          <table:table-cell office:value-type="string">
            <text:p>Réglette 6 pouces en PMMA 1</text:p>
          </table:table-cell>
          <table:table-cell table:number-columns-repeated="5"/>
        </table:table-row>
        <table:table-row table:style-name="ro1">
          <table:table-cell office:value-type="string">
            <text:p>Réglette 9 pouces en MDF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9 pouces</text:p>
          </table:table-cell>
          <table:table-cell office:value-type="string">
            <text:p>Réglette 9 pouces en MDF 1</text:p>
          </table:table-cell>
          <table:table-cell table:number-columns-repeated="5"/>
        </table:table-row>
        <table:table-row table:style-name="ro1">
          <table:table-cell office:value-type="string">
            <text:p>Réglette 9 pouces en MDF Magnétique</text:p>
          </table:table-cell>
          <table:table-cell office:value-type="currency" office:currency="EUR" office:value="3.15">
            <text:p>3,15 €</text:p>
          </table:table-cell>
          <table:table-cell office:value-type="string">
            <text:p>9 pouces</text:p>
          </table:table-cell>
          <table:table-cell office:value-type="string">
            <text:p>Réglette 9 pouces en MDF Magnétique 1</text:p>
          </table:table-cell>
          <table:table-cell table:number-columns-repeated="5"/>
        </table:table-row>
        <table:table-row table:style-name="ro1">
          <table:table-cell office:value-type="string">
            <text:p>Réglette 9 pouces en PMMA</text:p>
          </table:table-cell>
          <table:table-cell office:value-type="currency" office:currency="EUR" office:value="3.1">
            <text:p>3,10 €</text:p>
          </table:table-cell>
          <table:table-cell office:value-type="string">
            <text:p>9 pouces</text:p>
          </table:table-cell>
          <table:table-cell office:value-type="string">
            <text:p>Réglette 9 pouces en PMMA 1</text:p>
          </table:table-cell>
          <table:table-cell table:number-columns-repeated="5"/>
        </table:table-row>
        <table:table-row table:style-name="ro1">
          <table:table-cell office:value-type="string">
            <text:p>Réglette 12 pouces en MDF</text:p>
          </table:table-cell>
          <table:table-cell office:value-type="currency" office:currency="EUR" office:value="2">
            <text:p>2,00 €</text:p>
          </table:table-cell>
          <table:table-cell office:value-type="string">
            <text:p>12 pouces</text:p>
          </table:table-cell>
          <table:table-cell office:value-type="string">
            <text:p>Réglette 12 pouces en MDF 1</text:p>
          </table:table-cell>
          <table:table-cell table:number-columns-repeated="5"/>
        </table:table-row>
        <table:table-row table:style-name="ro1">
          <table:table-cell office:value-type="string">
            <text:p>Réglette 12 pouces en MDF Magnétique</text:p>
          </table:table-cell>
          <table:table-cell office:value-type="currency" office:currency="EUR" office:value="5.25">
            <text:p>5,25 €</text:p>
          </table:table-cell>
          <table:table-cell office:value-type="string">
            <text:p>12 pouces</text:p>
          </table:table-cell>
          <table:table-cell office:value-type="string">
            <text:p>Réglette 12 pouces en MDF Magnétique 1</text:p>
          </table:table-cell>
          <table:table-cell table:number-columns-repeated="5"/>
        </table:table-row>
        <table:table-row table:style-name="ro1">
          <table:table-cell office:value-type="string">
            <text:p>Dice Arena</text:p>
          </table:table-cell>
          <table:table-cell office:value-type="currency" office:currency="EUR" office:value="32">
            <text:p>32,00 €</text:p>
          </table:table-cell>
          <table:table-cell office:value-type="string">
            <text:p>24x24x7cm</text:p>
          </table:table-cell>
          <table:table-cell office:value-type="string">
            <text:p>Dice Arena 1</text:p>
          </table:table-cell>
          <table:table-cell office:value-type="string">
            <text:p>Dice Arena 2</text:p>
          </table:table-cell>
          <table:table-cell office:value-type="string">
            <text:p>Dice Arena 3</text:p>
          </table:table-cell>
          <table:table-cell office:value-type="string">
            <text:p>Dice Arena 4</text:p>
          </table:table-cell>
          <table:table-cell office:value-type="string">
            <text:p>Dice Arena 5</text:p>
          </table:table-cell>
          <table:table-cell/>
        </table:table-row>
        <table:table-row table:style-name="ro2">
          <table:table-cell office:value-type="string">
            <text:p>Dice Arena Doubl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30x17x11 cm</text:p>
          </table:table-cell>
          <table:table-cell office:value-type="string">
            <text:p>Dice Arena Double 1</text:p>
          </table:table-cell>
          <table:table-cell office:value-type="string">
            <text:p>Dice Arena Double 2</text:p>
          </table:table-cell>
          <table:table-cell office:value-type="string">
            <text:p>Dice Arena Double 3</text:p>
          </table:table-cell>
          <table:table-cell office:value-type="string">
            <text:p>Dice Arena Double 4</text:p>
          </table:table-cell>
          <table:table-cell table:number-columns-repeated="2"/>
        </table:table-row>
        <table:table-row table:style-name="ro1">
          <table:table-cell office:value-type="string">
            <text:p>Dice Arena Human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Human 1</text:p>
          </table:table-cell>
          <table:table-cell office:value-type="string">
            <text:p>Dice Arena Human2</text:p>
          </table:table-cell>
          <table:table-cell office:value-type="string">
            <text:p>Dice Arena Human 3</text:p>
          </table:table-cell>
          <table:table-cell office:value-type="string">
            <text:p>Dice Arena Human 4</text:p>
          </table:table-cell>
          <table:table-cell office:value-type="string">
            <text:p>Dice Arena Human 5</text:p>
          </table:table-cell>
          <table:table-cell/>
        </table:table-row>
        <table:table-row table:style-name="ro1">
          <table:table-cell office:value-type="string">
            <text:p>Dice Arena Orc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Orc 1</text:p>
          </table:table-cell>
          <table:table-cell office:value-type="string">
            <text:p>Dice Arena Orc 2</text:p>
          </table:table-cell>
          <table:table-cell office:value-type="string">
            <text:p>Dice Arena Orc 3</text:p>
          </table:table-cell>
          <table:table-cell office:value-type="string">
            <text:p>Dice Arena Orc 4</text:p>
          </table:table-cell>
          <table:table-cell table:number-columns-repeated="2"/>
        </table:table-row>
        <table:table-row table:style-name="ro1">
          <table:table-cell office:value-type="string">
            <text:p>Mini Dice Tower Hum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10x10x10 cm</text:p>
          </table:table-cell>
          <table:table-cell office:value-type="string">
            <text:p>Mini Dice Tower Human 1</text:p>
          </table:table-cell>
          <table:table-cell table:number-columns-repeated="5"/>
        </table:table-row>
        <table:table-row table:style-name="ro1">
          <table:table-cell office:value-type="string">
            <text:p>Mini Dice Tower Orc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14x14x10 cm</text:p>
          </table:table-cell>
          <table:table-cell office:value-type="string">
            <text:p>Mini Dice Tower Orc1</text:p>
          </table:table-cell>
          <table:table-cell table:number-columns-repeated="5"/>
        </table:table-row>
        <table:table-row table:style-name="ro1">
          <table:table-cell office:value-type="string">
            <text:p>Chests D2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5x14 cm</text:p>
          </table:table-cell>
          <table:table-cell office:value-type="string">
            <text:p>Chests D20 1</text:p>
          </table:table-cell>
          <table:table-cell office:value-type="string">
            <text:p>Chests D20 2</text:p>
          </table:table-cell>
          <table:table-cell office:value-type="string">
            <text:p>Chests D20 3</text:p>
          </table:table-cell>
          <table:table-cell office:value-type="string">
            <text:p>Chests D20 4</text:p>
          </table:table-cell>
          <table:table-cell office:value-type="string">
            <text:p>Chests D20 5</text:p>
          </table:table-cell>
          <table:table-cell/>
        </table:table-row>
        <table:table-row table:style-name="ro1">
          <table:table-cell office:value-type="string">
            <text:p>Chests Normal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15x10x11 cm</text:p>
          </table:table-cell>
          <table:table-cell office:value-type="string">
            <text:p>Chests Normal 1</text:p>
          </table:table-cell>
          <table:table-cell office:value-type="string">
            <text:p>Chests Normal 2</text:p>
          </table:table-cell>
          <table:table-cell office:value-type="string">
            <text:p>Chests Normal 3</text:p>
          </table:table-cell>
          <table:table-cell office:value-type="string">
            <text:p>Chests Normal 4</text:p>
          </table:table-cell>
          <table:table-cell table:number-columns-repeated="2"/>
        </table:table-row>
        <table:table-row table:style-name="ro1">
          <table:table-cell office:value-type="string">
            <text:p>Chests Dungeon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1x11 cm</text:p>
          </table:table-cell>
          <table:table-cell office:value-type="string">
            <text:p>Chests Dungeon 1</text:p>
          </table:table-cell>
          <table:table-cell office:value-type="string">
            <text:p>Chests Dungeon 2</text:p>
          </table:table-cell>
          <table:table-cell office:value-type="string">
            <text:p>Chests Dungeon3</text:p>
          </table:table-cell>
          <table:table-cell office:value-type="string">
            <text:p>Chests Dungeon4</text:p>
          </table:table-cell>
          <table:table-cell office:value-type="string">
            <text:p>Chests Dungeon5</text:p>
          </table:table-cell>
          <table:table-cell/>
        </table:table-row>
        <table:table-row table:style-name="ro1">
          <table:table-cell office:value-type="string">
            <text:p>Chests Legendary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18x13x12 cm</text:p>
          </table:table-cell>
          <table:table-cell office:value-type="string">
            <text:p>Chests Legendary 1</text:p>
          </table:table-cell>
          <table:table-cell office:value-type="string">
            <text:p>Chests Legendary 2</text:p>
          </table:table-cell>
          <table:table-cell office:value-type="string">
            <text:p>Chests Legendary 3</text:p>
          </table:table-cell>
          <table:table-cell office:value-type="string">
            <text:p>Chests Legendary 4</text:p>
          </table:table-cell>
          <table:table-cell office:value-type="string">
            <text:p>Chests Legendary 5</text:p>
          </table:table-cell>
          <table:table-cell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22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3-28T22:58:09.97</dc:date>
    <dc:creator>Ycham Bounouar</dc:creator>
    <meta:editing-duration>PT1H31M26S</meta:editing-duration>
    <meta:editing-cycles>16</meta:editing-cycles>
    <meta:document-statistic meta:table-count="1" meta:cell-count="122" meta:object-count="0"/>
  </office:meta>
</office:document-meta>
</file>