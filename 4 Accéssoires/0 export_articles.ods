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</table:table-row>
        <table:table-row table:style-name="ro1">
          <table:table-cell office:value-type="string">
            <text:p>Réglette 3 pouces en MDF</text:p>
          </table:table-cell>
          <table:table-cell office:value-type="currency" office:currency="EUR" office:value="0.4">
            <text:p>0,40 €</text:p>
          </table:table-cell>
          <table:table-cell office:value-type="string">
            <text:p>3 pouces</text:p>
          </table:table-cell>
          <table:table-cell office:value-type="string">
            <text:p>Réglette 3 pouces en MDF 1</text:p>
          </table:table-cell>
          <table:table-cell office:value-type="string">
            <text:p>Réglette 3 pouces en MDF 2</text:p>
          </table:table-cell>
          <table:table-cell table:number-columns-repeated="6"/>
        </table:table-row>
        <table:table-row table:style-name="ro1">
          <table:table-cell office:value-type="string">
            <text:p>Réglette 3 pouces en MDF Magnétique</text:p>
          </table:table-cell>
          <table:table-cell office:value-type="currency" office:currency="EUR" office:value="1.05">
            <text:p>1,05 €</text:p>
          </table:table-cell>
          <table:table-cell office:value-type="string">
            <text:p>3 pouces</text:p>
          </table:table-cell>
          <table:table-cell office:value-type="string">
            <text:p>Réglette 3 pouces en MDF Magnétique 1</text:p>
          </table:table-cell>
          <table:table-cell office:value-type="string">
            <text:p>Réglette 3 pouces en MDF Magnétique 2</text:p>
          </table:table-cell>
          <table:table-cell table:number-columns-repeated="6"/>
        </table:table-row>
        <table:table-row table:style-name="ro1">
          <table:table-cell office:value-type="string">
            <text:p>Réglette 3 pouces en PMMA</text:p>
          </table:table-cell>
          <table:table-cell office:value-type="currency" office:currency="EUR" office:value="1.63">
            <text:p>1,63 €</text:p>
          </table:table-cell>
          <table:table-cell office:value-type="string">
            <text:p>3 pouces</text:p>
          </table:table-cell>
          <table:table-cell office:value-type="string">
            <text:p>Réglette 3 pouces en PMMA 1</text:p>
          </table:table-cell>
          <table:table-cell office:value-type="string">
            <text:p>Réglette 3 pouces en PMMA 2</text:p>
          </table:table-cell>
          <table:table-cell office:value-type="string">
            <text:p>Réglette 3 pouces en PMMA 3</text:p>
          </table:table-cell>
          <table:table-cell office:value-type="string">
            <text:p>Réglette 3 pouces en PMMA 4</text:p>
          </table:table-cell>
          <table:table-cell office:value-type="string">
            <text:p>Réglette 3 pouces en PMMA 5</text:p>
          </table:table-cell>
          <table:table-cell office:value-type="string">
            <text:p>Réglette 3 pouces en PMMA 6</text:p>
          </table:table-cell>
          <table:table-cell table:number-columns-repeated="2"/>
        </table:table-row>
        <table:table-row table:style-name="ro1">
          <table:table-cell office:value-type="string">
            <text:p>Réglette 6 pouces en MDF</text:p>
          </table:table-cell>
          <table:table-cell office:value-type="currency" office:currency="EUR" office:value="0.8">
            <text:p>0,80 €</text:p>
          </table:table-cell>
          <table:table-cell office:value-type="string">
            <text:p>6 pouces</text:p>
          </table:table-cell>
          <table:table-cell office:value-type="string">
            <text:p>Réglette 6 pouces en MDF 1</text:p>
          </table:table-cell>
          <table:table-cell office:value-type="string">
            <text:p>Réglette 6 pouces en MDF 2</text:p>
          </table:table-cell>
          <table:table-cell table:number-columns-repeated="6"/>
        </table:table-row>
        <table:table-row table:style-name="ro1">
          <table:table-cell office:value-type="string">
            <text:p>Réglette 6 pouces en MDF Magnétique</text:p>
          </table:table-cell>
          <table:table-cell office:value-type="currency" office:currency="EUR" office:value="2.1">
            <text:p>2,10 €</text:p>
          </table:table-cell>
          <table:table-cell office:value-type="string">
            <text:p>6 pouces</text:p>
          </table:table-cell>
          <table:table-cell office:value-type="string">
            <text:p>Réglette 6 pouces en MDF Magnétique 1</text:p>
          </table:table-cell>
          <table:table-cell office:value-type="string">
            <text:p>Réglette 6 pouces en MDF Magnétique 2</text:p>
          </table:table-cell>
          <table:table-cell office:value-type="string">
            <text:p>Réglette 6 pouces en MDF Magnétique 3</text:p>
          </table:table-cell>
          <table:table-cell office:value-type="string">
            <text:p>Réglette 6 pouces en MDF Magnétique 4</text:p>
          </table:table-cell>
          <table:table-cell table:number-columns-repeated="4"/>
        </table:table-row>
        <table:table-row table:style-name="ro1">
          <table:table-cell office:value-type="string">
            <text:p>Réglette 6 pouces en PMMA</text:p>
          </table:table-cell>
          <table:table-cell office:value-type="currency" office:currency="EUR" office:value="2.37">
            <text:p>2,37 €</text:p>
          </table:table-cell>
          <table:table-cell office:value-type="string">
            <text:p>6 pouces</text:p>
          </table:table-cell>
          <table:table-cell office:value-type="string">
            <text:p>Réglette 6 pouces en PMMA 1</text:p>
          </table:table-cell>
          <table:table-cell office:value-type="string">
            <text:p>Réglette 6 pouces en PMMA 2</text:p>
          </table:table-cell>
          <table:table-cell office:value-type="string">
            <text:p>Réglette 6 pouces en PMMA 3</text:p>
          </table:table-cell>
          <table:table-cell office:value-type="string">
            <text:p>Réglette 6 pouces en PMMA 4</text:p>
          </table:table-cell>
          <table:table-cell office:value-type="string">
            <text:p>Réglette 6 pouces en PMMA 5</text:p>
          </table:table-cell>
          <table:table-cell office:value-type="string">
            <text:p>Réglette 6 pouces en PMMA 6</text:p>
          </table:table-cell>
          <table:table-cell table:number-columns-repeated="2"/>
        </table:table-row>
        <table:table-row table:style-name="ro1">
          <table:table-cell office:value-type="string">
            <text:p>Réglette 9 pouces en MDF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9 pouces</text:p>
          </table:table-cell>
          <table:table-cell office:value-type="string">
            <text:p>Réglette 9 pouces en MDF 1</text:p>
          </table:table-cell>
          <table:table-cell table:number-columns-repeated="7"/>
        </table:table-row>
        <table:table-row table:style-name="ro1">
          <table:table-cell office:value-type="string">
            <text:p>Réglette 9 pouces en MDF Magnétique</text:p>
          </table:table-cell>
          <table:table-cell office:value-type="currency" office:currency="EUR" office:value="3.15">
            <text:p>3,15 €</text:p>
          </table:table-cell>
          <table:table-cell office:value-type="string">
            <text:p>9 pouces</text:p>
          </table:table-cell>
          <table:table-cell office:value-type="string">
            <text:p>Réglette 9 pouces en MDF Magnétique 1</text:p>
          </table:table-cell>
          <table:table-cell table:number-columns-repeated="7"/>
        </table:table-row>
        <table:table-row table:style-name="ro1">
          <table:table-cell office:value-type="string">
            <text:p>Réglette 9 pouces en PMMA</text:p>
          </table:table-cell>
          <table:table-cell office:value-type="currency" office:currency="EUR" office:value="3.1">
            <text:p>3,10 €</text:p>
          </table:table-cell>
          <table:table-cell office:value-type="string">
            <text:p>9 pouces</text:p>
          </table:table-cell>
          <table:table-cell office:value-type="string">
            <text:p>Réglette 9 pouces en PMMA 1</text:p>
          </table:table-cell>
          <table:table-cell table:number-columns-repeated="7"/>
        </table:table-row>
        <table:table-row table:style-name="ro1">
          <table:table-cell office:value-type="string">
            <text:p>Réglette 12 pouces en MDF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12 pouces</text:p>
          </table:table-cell>
          <table:table-cell office:value-type="string">
            <text:p>Réglette 12 pouces en MDF 1</text:p>
          </table:table-cell>
          <table:table-cell table:number-columns-repeated="7"/>
        </table:table-row>
        <table:table-row table:style-name="ro1">
          <table:table-cell office:value-type="string">
            <text:p>Réglette 12 pouces en MDF Magnétique</text:p>
          </table:table-cell>
          <table:table-cell office:value-type="currency" office:currency="EUR" office:value="5.25">
            <text:p>5,25 €</text:p>
          </table:table-cell>
          <table:table-cell office:value-type="string">
            <text:p>12 pouces</text:p>
          </table:table-cell>
          <table:table-cell office:value-type="string">
            <text:p>Réglette 12 pouces en MDF Magnétique 1</text:p>
          </table:table-cell>
          <table:table-cell table:number-columns-repeated="7"/>
        </table:table-row>
        <table:table-row table:style-name="ro2">
          <table:table-cell office:value-type="string">
            <text:p>Dice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16mm</text:p>
          </table:table-cell>
          <table:table-cell office:value-type="string">
            <text:p>Dice 1</text:p>
          </table:table-cell>
          <table:table-cell office:value-type="string">
            <text:p>Dice 2</text:p>
          </table:table-cell>
          <table:table-cell office:value-type="string">
            <text:p>Dice 3</text:p>
          </table:table-cell>
          <table:table-cell office:value-type="string">
            <text:p>Dice 4</text:p>
          </table:table-cell>
          <table:table-cell office:value-type="string">
            <text:p>Dice 5</text:p>
          </table:table-cell>
          <table:table-cell office:value-type="string">
            <text:p>Dice 6</text:p>
          </table:table-cell>
          <table:table-cell office:value-type="string">
            <text:p>Dice 7</text:p>
          </table:table-cell>
          <table:table-cell office:value-type="string">
            <text:p>Dice 8</text:p>
          </table:table-cell>
        </table:table-row>
        <table:table-row table:style-name="ro2">
          <table:table-cell office:value-type="string">
            <text:p>Box 27 Dices 16mm</text:p>
          </table:table-cell>
          <table:table-cell office:value-type="currency" office:currency="EUR" office:value="5">
            <text:p>5,00 €</text:p>
          </table:table-cell>
          <table:table-cell/>
          <table:table-cell office:value-type="string">
            <text:p>Box 27 Dices 16mm 1</text:p>
          </table:table-cell>
          <table:table-cell office:value-type="string">
            <text:p>Box 27 Dices 16mm 2</text:p>
          </table:table-cell>
          <table:table-cell office:value-type="string">
            <text:p>Box 27 Dices 16mm 3</text:p>
          </table:table-cell>
          <table:table-cell office:value-type="string">
            <text:p>Box 27 Dices 16mm 4</text:p>
          </table:table-cell>
          <table:table-cell office:value-type="string">
            <text:p>Box 27 Dices 16mm 5</text:p>
          </table:table-cell>
          <table:table-cell table:number-columns-repeated="3"/>
        </table:table-row>
        <table:table-row table:style-name="ro1">
          <table:table-cell office:value-type="string">
            <text:p>Dice Arena</text:p>
          </table:table-cell>
          <table:table-cell office:value-type="currency" office:currency="EUR" office:value="32">
            <text:p>32,00 €</text:p>
          </table:table-cell>
          <table:table-cell office:value-type="string">
            <text:p>24x24x7cm</text:p>
          </table:table-cell>
          <table:table-cell office:value-type="string">
            <text:p>Dice Arena 1</text:p>
          </table:table-cell>
          <table:table-cell office:value-type="string">
            <text:p>Dice Arena 2</text:p>
          </table:table-cell>
          <table:table-cell office:value-type="string">
            <text:p>Dice Arena 3</text:p>
          </table:table-cell>
          <table:table-cell office:value-type="string">
            <text:p>Dice Arena 4</text:p>
          </table:table-cell>
          <table:table-cell office:value-type="string">
            <text:p>Dice Arena 5</text:p>
          </table:table-cell>
          <table:table-cell table:number-columns-repeated="3"/>
        </table:table-row>
        <table:table-row table:style-name="ro2">
          <table:table-cell office:value-type="string">
            <text:p>Dice Arena XL</text:p>
          </table:table-cell>
          <table:table-cell table:number-columns-repeated="2"/>
          <table:table-cell office:value-type="string">
            <text:p>Dice Arena XL 1</text:p>
          </table:table-cell>
          <table:table-cell office:value-type="string">
            <text:p>Dice Arena XL 2</text:p>
          </table:table-cell>
          <table:table-cell office:value-type="string">
            <text:p>Dice Arena XL 3</text:p>
          </table:table-cell>
          <table:table-cell office:value-type="string">
            <text:p>Dice Arena XL 4</text:p>
          </table:table-cell>
          <table:table-cell table:number-columns-repeated="4"/>
        </table:table-row>
        <table:table-row table:style-name="ro1">
          <table:table-cell office:value-type="string">
            <text:p>Dice Arena Doubl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30x17x11 cm</text:p>
          </table:table-cell>
          <table:table-cell office:value-type="string">
            <text:p>Dice Arena Double 1</text:p>
          </table:table-cell>
          <table:table-cell office:value-type="string">
            <text:p>Dice Arena Double 2</text:p>
          </table:table-cell>
          <table:table-cell office:value-type="string">
            <text:p>Dice Arena Double 3</text:p>
          </table:table-cell>
          <table:table-cell office:value-type="string">
            <text:p>Dice Arena Double 4</text:p>
          </table:table-cell>
          <table:table-cell table:number-columns-repeated="4"/>
        </table:table-row>
        <table:table-row table:style-name="ro1">
          <table:table-cell office:value-type="string">
            <text:p>Dice Arena Human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Human 1</text:p>
          </table:table-cell>
          <table:table-cell office:value-type="string">
            <text:p>Dice Arena Human2</text:p>
          </table:table-cell>
          <table:table-cell office:value-type="string">
            <text:p>Dice Arena Human 3</text:p>
          </table:table-cell>
          <table:table-cell office:value-type="string">
            <text:p>Dice Arena Human 4</text:p>
          </table:table-cell>
          <table:table-cell office:value-type="string">
            <text:p>Dice Arena Human 5</text:p>
          </table:table-cell>
          <table:table-cell table:number-columns-repeated="3"/>
        </table:table-row>
        <table:table-row table:style-name="ro1">
          <table:table-cell office:value-type="string">
            <text:p>Dice Arena Orc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Orc 1</text:p>
          </table:table-cell>
          <table:table-cell office:value-type="string">
            <text:p>Dice Arena Orc 2</text:p>
          </table:table-cell>
          <table:table-cell office:value-type="string">
            <text:p>Dice Arena Orc 3</text:p>
          </table:table-cell>
          <table:table-cell office:value-type="string">
            <text:p>Dice Arena Orc 4</text:p>
          </table:table-cell>
          <table:table-cell table:number-columns-repeated="4"/>
        </table:table-row>
        <table:table-row table:style-name="ro2">
          <table:table-cell office:value-type="string">
            <text:p>Mini Dice Tower Hum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0x10x10 cm</text:p>
          </table:table-cell>
          <table:table-cell office:value-type="string">
            <text:p>Mini Dice Tower Human 1</text:p>
          </table:table-cell>
          <table:table-cell office:value-type="string">
            <text:p>Mini Dice Tower Human 2</text:p>
          </table:table-cell>
          <table:table-cell office:value-type="string">
            <text:p>Mini Dice Tower Human 3</text:p>
          </table:table-cell>
          <table:table-cell office:value-type="string">
            <text:p>Mini Dice Tower Human 4</text:p>
          </table:table-cell>
          <table:table-cell table:number-columns-repeated="4"/>
        </table:table-row>
        <table:table-row table:style-name="ro2">
          <table:table-cell office:value-type="string">
            <text:p>Mini Dice Tower Orc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4x14x10 cm</text:p>
          </table:table-cell>
          <table:table-cell office:value-type="string">
            <text:p>Mini Dice Tower Orc1</text:p>
          </table:table-cell>
          <table:table-cell office:value-type="string">
            <text:p>Mini Dice Tower Orc2</text:p>
          </table:table-cell>
          <table:table-cell table:number-columns-repeated="6"/>
        </table:table-row>
        <table:table-row table:style-name="ro2">
          <table:table-cell office:value-type="string">
            <text:p>Chests D2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5x14 cm</text:p>
          </table:table-cell>
          <table:table-cell office:value-type="string">
            <text:p>Chests D20 1</text:p>
          </table:table-cell>
          <table:table-cell office:value-type="string">
            <text:p>Chests D20 2</text:p>
          </table:table-cell>
          <table:table-cell office:value-type="string">
            <text:p>Chests D20 3</text:p>
          </table:table-cell>
          <table:table-cell office:value-type="string">
            <text:p>Chests D20 4</text:p>
          </table:table-cell>
          <table:table-cell office:value-type="string">
            <text:p>Chests D20 5</text:p>
          </table:table-cell>
          <table:table-cell office:value-type="string">
            <text:p>Chests D20 6</text:p>
          </table:table-cell>
          <table:table-cell table:number-columns-repeated="2"/>
        </table:table-row>
        <table:table-row table:style-name="ro2">
          <table:table-cell office:value-type="string">
            <text:p>Chests Normal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5x10x11 cm</text:p>
          </table:table-cell>
          <table:table-cell office:value-type="string">
            <text:p>Chests Normal 1</text:p>
          </table:table-cell>
          <table:table-cell office:value-type="string">
            <text:p>Chests Normal 2</text:p>
          </table:table-cell>
          <table:table-cell office:value-type="string">
            <text:p>Chests Normal 3</text:p>
          </table:table-cell>
          <table:table-cell office:value-type="string">
            <text:p>Chests Normal 4</text:p>
          </table:table-cell>
          <table:table-cell office:value-type="string">
            <text:p>Chests Normal 5</text:p>
          </table:table-cell>
          <table:table-cell table:number-columns-repeated="3"/>
        </table:table-row>
        <table:table-row table:style-name="ro2">
          <table:table-cell office:value-type="string">
            <text:p>Chests Dungeon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1x11 cm</text:p>
          </table:table-cell>
          <table:table-cell office:value-type="string">
            <text:p>Chests Dungeon 1</text:p>
          </table:table-cell>
          <table:table-cell office:value-type="string">
            <text:p>Chests Dungeon 2</text:p>
          </table:table-cell>
          <table:table-cell office:value-type="string">
            <text:p>Chests Dungeon3</text:p>
          </table:table-cell>
          <table:table-cell office:value-type="string">
            <text:p>Chests Dungeon 4</text:p>
          </table:table-cell>
          <table:table-cell office:value-type="string">
            <text:p>Chests Dungeon 5</text:p>
          </table:table-cell>
          <table:table-cell office:value-type="string">
            <text:p>Chests Dungeon 6</text:p>
          </table:table-cell>
          <table:table-cell table:number-columns-repeated="2"/>
        </table:table-row>
        <table:table-row table:style-name="ro2">
          <table:table-cell office:value-type="string">
            <text:p>Chests Legendary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8x13x12 cm</text:p>
          </table:table-cell>
          <table:table-cell office:value-type="string">
            <text:p>Chests Legendary 1</text:p>
          </table:table-cell>
          <table:table-cell office:value-type="string">
            <text:p>Chests Legendary 2</text:p>
          </table:table-cell>
          <table:table-cell office:value-type="string">
            <text:p>Chests Legendary 3</text:p>
          </table:table-cell>
          <table:table-cell office:value-type="string">
            <text:p>Chests Legendary 4</text:p>
          </table:table-cell>
          <table:table-cell office:value-type="string">
            <text:p>Chests Legendary 5</text:p>
          </table:table-cell>
          <table:table-cell office:value-type="string">
            <text:p>Chests Legendary 6</text:p>
          </table:table-cell>
          <table:table-cell table:number-columns-repeated="2"/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/04/2026</text:date>, <text:time>22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9T22:18:05.99</dc:date>
    <dc:creator>Ycham Bounouar</dc:creator>
    <meta:editing-duration>PT1H52M33S</meta:editing-duration>
    <meta:editing-cycles>22</meta:editing-cycles>
    <meta:document-statistic meta:table-count="1" meta:cell-count="171" meta:object-count="0"/>
  </office:meta>
</office:document-meta>
</file>