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Deamon Legions - Archicultist Blessed </text:p>
          </table:table-cell>
          <table:table-cell office:value-type="currency" office:currency="EUR" office:value="5">
            <text:p>5,00 €</text:p>
          </table:table-cell>
          <table:table-cell table:number-columns-repeated="2"/>
          <table:table-cell office:value-type="string">
            <text:p>Deamon Legions - Archicultist Blessed 1</text:p>
          </table:table-cell>
          <table:table-cell office:value-type="string">
            <text:p>Deamon Legions - Archicultist Blessed 2</text:p>
          </table:table-cell>
          <table:table-cell office:value-type="string">
            <text:p>Deamon Legions - Archicultist Blessed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Blessed 2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Deamon Legions - Archicultist Blessed 2 1</text:p>
          </table:table-cell>
          <table:table-cell office:value-type="string">
            <text:p>Deamon Legions - Archicultist Blessed 2 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Etat-Major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Deamon Legions - Archicultist Etat-Major 1</text:p>
          </table:table-cell>
          <table:table-cell office:value-type="string">
            <text:p>Deamon Legions - Archicultist Etat-Major 2</text:p>
          </table:table-cell>
          <table:table-cell office:value-type="string">
            <text:p>Deamon Legions - Archicultist Etat-Major 3</text:p>
          </table:table-cell>
          <table:table-cell table:number-columns-repeated="4"/>
        </table:table-row>
        <table:table-row table:style-name="ro1">
          <table:table-cell office:value-type="string">
            <text:p>Deamon Legions - Archicultist x10 <text:s/>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Deamon Legions - Archicultist x10 <text:s/>1</text:p>
          </table:table-cell>
          <table:table-cell office:value-type="string">
            <text:p>Deamon Legions - Archicultist x10 <text:s/>2</text:p>
          </table:table-cell>
          <table:table-cell office:value-type="string">
            <text:p>Deamon Legions - Archicultist x10 <text:s/>3</text:p>
          </table:table-cell>
          <table:table-cell office:value-type="string">
            <text:p>Deamon Legions - Archicultist x10 <text:s/>4</text:p>
          </table:table-cell>
          <table:table-cell office:value-type="string">
            <text:p>Deamon Legions - Archicultist x10 <text:s/>5</text:p>
          </table:table-cell>
          <table:table-cell office:value-type="string">
            <text:p>Deamon Legions - Archicultist x10 <text:s/>6</text:p>
          </table:table-cell>
          <table:table-cell/>
        </table:table-row>
        <table:table-row table:style-name="ro1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6"/>
        </table:table-row>
        <table:table-row table:style-name="ro1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6"/>
        </table:table-row>
        <table:table-row table:style-name="ro1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6"/>
        </table:table-row>
        <table:table-row table:style-name="ro1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4"/>
        </table:table-row>
        <table:table-row table:style-name="ro1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3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5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Etat-Major 1</text:p>
          </table:table-cell>
          <table:table-cell table:number-columns-repeated="6"/>
        </table:table-row>
        <table:table-row table:style-name="ro1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5"/>
        </table:table-row>
        <table:table-row table:style-name="ro1">
          <table:table-cell office:value-type="string">
            <text:p>Deamon Legions - Sacrifice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Deamon Legions - Sacrifice 1</text:p>
          </table:table-cell>
          <table:table-cell office:value-type="string">
            <text:p>Deamon Legions - Sacrifice 2</text:p>
          </table:table-cell>
          <table:table-cell office:value-type="string">
            <text:p>Deamon Legions - Sacrifice 3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5"/>
        </table:table-row>
        <table:table-row table:style-name="ro1">
          <table:table-cell office:value-type="string">
            <text:p>Deamon Legions - Babayaga </text:p>
          </table:table-cell>
          <table:table-cell office:value-type="currency" office:currency="EUR" office:value="100">
            <text:p>100,00 €</text:p>
          </table:table-cell>
          <table:table-cell table:number-columns-repeated="2"/>
          <table:table-cell office:value-type="string">
            <text:p>Deamon Legions - Babayaga 1</text:p>
          </table:table-cell>
          <table:table-cell office:value-type="string">
            <text:p>Deamon Legions - Babayaga 2</text:p>
          </table:table-cell>
          <table:table-cell office:value-type="string">
            <text:p>Deamon Legions - Babayaga 3</text:p>
          </table:table-cell>
          <table:table-cell office:value-type="string">
            <text:p>Deamon Legions - Babayaga 4</text:p>
          </table:table-cell>
          <table:table-cell office:value-type="string">
            <text:p>Deamon Legions - Babayaga 5</text:p>
          </table:table-cell>
          <table:table-cell office:value-type="string">
            <text:p>Deamon Legions - Babayaga 6</text:p>
          </table:table-cell>
          <table:table-cell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5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3"/>
        </table:table-row>
        <table:table-row table:style-name="ro1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3"/>
        </table:table-row>
        <table:table-row table:style-name="ro1">
          <table:table-cell office:value-type="string">
            <text:p>Legion of Skull - Wolfs Infanterie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Etat-Major 1</text:p>
          </table:table-cell>
          <table:table-cell office:value-type="string">
            <text:p>Legion of Skull - Wolfs Infanterie Etat-Major 2</text:p>
          </table:table-cell>
          <table:table-cell office:value-type="string">
            <text:p>Legion of Skull - Wolfs Infanterie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Infanterie x10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Wolfs Infanterie x10 1</text:p>
          </table:table-cell>
          <table:table-cell office:value-type="string">
            <text:p>Legion of Skull - Wolfs Infanterie x10 2</text:p>
          </table:table-cell>
          <table:table-cell office:value-type="string">
            <text:p>Legion of Skull - Wolfs Infanterie x10 3</text:p>
          </table:table-cell>
          <table:table-cell office:value-type="string">
            <text:p>Legion of Skull - Wolfs Infanterie x10 4</text:p>
          </table:table-cell>
          <table:table-cell office:value-type="string">
            <text:p>Legion of Skull - Wolfs Infanterie x10 5</text:p>
          </table:table-cell>
          <table:table-cell office:value-type="string">
            <text:p>Legion of Skull - Wolfs Infanterie x10 6</text:p>
          </table:table-cell>
          <table:table-cell/>
        </table:table-row>
        <table:table-row table:style-name="ro1">
          <table:table-cell office:value-type="string">
            <text:p>Legion of Skulls - Wolf Hero 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s - Wolf Hero 1</text:p>
          </table:table-cell>
          <table:table-cell office:value-type="string">
            <text:p>Legion of Skulls - Wolf Hero 2</text:p>
          </table:table-cell>
          <table:table-cell office:value-type="string">
            <text:p>Legion of Skulls - Wolf Hero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Etat-Major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Wolfs Etat-Major 1</text:p>
          </table:table-cell>
          <table:table-cell office:value-type="string">
            <text:p>Legion of Skull - Wolfs Etat-Major 2</text:p>
          </table:table-cell>
          <table:table-cell office:value-type="string">
            <text:p>Legion of Skull - Wolfs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Wolfs x3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Wolfs x3 1</text:p>
          </table:table-cell>
          <table:table-cell office:value-type="string">
            <text:p>Legion of Skull - Wolfs x3 2</text:p>
          </table:table-cell>
          <table:table-cell office:value-type="string">
            <text:p>Legion of Skull - Wolfs x3 3</text:p>
          </table:table-cell>
          <table:table-cell table:number-columns-repeated="4"/>
        </table:table-row>
        <table:table-row table:style-name="ro1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5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3"/>
        </table:table-row>
        <table:table-row table:style-name="ro1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3"/>
        </table:table-row>
        <table:table-row table:style-name="ro1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3"/>
        </table:table-row>
        <table:table-row table:style-name="ro1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4"/>
        </table:table-row>
        <table:table-row table:style-name="ro1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3"/>
        </table:table-row>
        <table:table-row table:style-name="ro1">
          <table:table-cell office:value-type="string">
            <text:p>Legion of Skull - Gots </text:p>
          </table:table-cell>
          <table:table-cell office:value-type="currency" office:currency="EUR" office:value="50">
            <text:p>50,00 €</text:p>
          </table:table-cell>
          <table:table-cell table:number-columns-repeated="2"/>
          <table:table-cell office:value-type="string">
            <text:p>Legion of Skull - Gots 1</text:p>
          </table:table-cell>
          <table:table-cell office:value-type="string">
            <text:p>Legion of Skull - Gots 2</text:p>
          </table:table-cell>
          <table:table-cell office:value-type="string">
            <text:p>Legion of Skull - Gots 3</text:p>
          </table:table-cell>
          <table:table-cell office:value-type="string">
            <text:p>Legion of Skull - Gots 4</text:p>
          </table:table-cell>
          <table:table-cell office:value-type="string">
            <text:p>Legion of Skull - Gots 5</text:p>
          </table:table-cell>
          <table:table-cell office:value-type="string">
            <text:p>Legion of Skull - Gots 6</text:p>
          </table:table-cell>
          <table:table-cell/>
        </table:table-row>
        <table:table-row table:style-name="ro1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5"/>
        </table:table-row>
        <table:table-row table:style-name="ro1">
          <table:table-cell office:value-type="string">
            <text:p>Lust Warriors - Regiment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1</text:p>
          </table:table-cell>
          <table:table-cell office:value-type="string">
            <text:p>Lust Warriors - Regiment Etat-Major 2</text:p>
          </table:table-cell>
          <table:table-cell office:value-type="string">
            <text:p>Lust Warriors - Regiment Etat-Major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1</text:p>
          </table:table-cell>
          <table:table-cell office:value-type="string">
            <text:p>Lust Warriors - Regiment x10 2</text:p>
          </table:table-cell>
          <table:table-cell office:value-type="string">
            <text:p>Lust Warriors - Regiment x10 3</text:p>
          </table:table-cell>
          <table:table-cell office:value-type="string">
            <text:p>Lust Warriors - Regiment x10 4</text:p>
          </table:table-cell>
          <table:table-cell office:value-type="string">
            <text:p>Lust Warriors - Regiment x10 5</text:p>
          </table:table-cell>
          <table:table-cell office:value-type="string">
            <text:p>Lust Warriors - Regiment x10 6</text:p>
          </table:table-cell>
          <table:table-cell/>
        </table:table-row>
        <table:table-row table:style-name="ro1">
          <table:table-cell office:value-type="string">
            <text:p>Lust Warriors - Regiment Etat-Major alt 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Etat-Major alt 1</text:p>
          </table:table-cell>
          <table:table-cell office:value-type="string">
            <text:p>Lust Warriors - Regiment Etat-Major alt 2</text:p>
          </table:table-cell>
          <table:table-cell office:value-type="string">
            <text:p>Lust Warriors - Regiment Etat-Major alt 3</text:p>
          </table:table-cell>
          <table:table-cell table:number-columns-repeated="4"/>
        </table:table-row>
        <table:table-row table:style-name="ro1">
          <table:table-cell office:value-type="string">
            <text:p>Lust Warriors - Regiment x10 alt 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ust Warriors - Regiment x10 alt 1</text:p>
          </table:table-cell>
          <table:table-cell office:value-type="string">
            <text:p>Lust Warriors - Regiment x10 alt 2</text:p>
          </table:table-cell>
          <table:table-cell office:value-type="string">
            <text:p>Lust Warriors - Regiment x10 alt 3</text:p>
          </table:table-cell>
          <table:table-cell office:value-type="string">
            <text:p>Lust Warriors - Regiment x10 alt 4</text:p>
          </table:table-cell>
          <table:table-cell office:value-type="string">
            <text:p>Lust Warriors - Regiment x10 alt 5</text:p>
          </table:table-cell>
          <table:table-cell office:value-type="string">
            <text:p>Lust Warriors - Regiment x10 alt 6</text:p>
          </table:table-cell>
          <table:table-cell/>
        </table:table-row>
        <table:table-row table:style-name="ro1">
          <table:table-cell office:value-type="string">
            <text:p>Lust Warriors -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Lust Warriors - Hero 1</text:p>
          </table:table-cell>
          <table:table-cell office:value-type="string">
            <text:p>Lust Warriors - Hero 2</text:p>
          </table:table-cell>
          <table:table-cell office:value-type="string">
            <text:p>Lust Warriors - Hero 3</text:p>
          </table:table-cell>
          <table:table-cell office:value-type="string">
            <text:p>Lust Warriors - Hero 4</text:p>
          </table:table-cell>
          <table:table-cell office:value-type="string">
            <text:p>Lust Warriors - Hero 5</text:p>
          </table:table-cell>
          <table:table-cell office:value-type="string">
            <text:p>Lust Warriors - Hero 6</text:p>
          </table:table-cell>
          <table:table-cell/>
        </table:table-row>
        <table:table-row table:style-name="ro1">
          <table:table-cell office:value-type="string">
            <text:p>Lust Warriors - Clai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Lust Warriors - Clair 1</text:p>
          </table:table-cell>
          <table:table-cell office:value-type="string">
            <text:p>Lust Warriors - Clair 2</text:p>
          </table:table-cell>
          <table:table-cell office:value-type="string">
            <text:p>Lust Warriors - Clair 3</text:p>
          </table:table-cell>
          <table:table-cell office:value-type="string">
            <text:p>Lust Warriors - Clair 4</text:p>
          </table:table-cell>
          <table:table-cell table:number-columns-repeated="3"/>
        </table:table-row>
        <table:table-row table:style-name="ro1">
          <table:table-cell office:value-type="string">
            <text:p>Lust Warriors - Alize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Lust Warriors - Alize 1</text:p>
          </table:table-cell>
          <table:table-cell office:value-type="string">
            <text:p>Lust Warriors - Alize 2</text:p>
          </table:table-cell>
          <table:table-cell office:value-type="string">
            <text:p>Lust Warriors - Alize 3</text:p>
          </table:table-cell>
          <table:table-cell office:value-type="string">
            <text:p>Lust Warriors - Alize 4</text:p>
          </table:table-cell>
          <table:table-cell table:number-columns-repeated="3"/>
        </table:table-row>
        <table:table-row table:style-name="ro1">
          <table:table-cell office:value-type="string">
            <text:p>Lust Warriors - Path 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ust Warriors - Path 1</text:p>
          </table:table-cell>
          <table:table-cell office:value-type="string">
            <text:p>Lust Warriors - Path 2</text:p>
          </table:table-cell>
          <table:table-cell office:value-type="string">
            <text:p>Lust Warriors - Path 3</text:p>
          </table:table-cell>
          <table:table-cell office:value-type="string">
            <text:p>Lust Warriors - Path 4</text:p>
          </table:table-cell>
          <table:table-cell office:value-type="string">
            <text:p>Lust Warriors - Path 5</text:p>
          </table:table-cell>
          <table:table-cell office:value-type="string">
            <text:p>Lust Warriors - Path 6</text:p>
          </table:table-cell>
          <table:table-cell/>
        </table:table-row>
        <table:table-row table:style-name="ro1">
          <table:table-cell office:value-type="string">
            <text:p>Lust Warriors - Shrine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Shrine 1</text:p>
          </table:table-cell>
          <table:table-cell office:value-type="string">
            <text:p>Lust Warriors - Shrine 2</text:p>
          </table:table-cell>
          <table:table-cell office:value-type="string">
            <text:p>Lust Warriors - Shrine 3</text:p>
          </table:table-cell>
          <table:table-cell office:value-type="string">
            <text:p>Lust Warriors - Shrine 4</text:p>
          </table:table-cell>
          <table:table-cell table:number-columns-repeated="3"/>
        </table:table-row>
        <table:table-row table:style-name="ro1">
          <table:table-cell office:value-type="string">
            <text:p>Lust Warriors - Chariot 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ust Warriors - Chariot 1</text:p>
          </table:table-cell>
          <table:table-cell office:value-type="string">
            <text:p>Lust Warriors - Chariot 2</text:p>
          </table:table-cell>
          <table:table-cell office:value-type="string">
            <text:p>Lust Warriors - Chariot 3</text:p>
          </table:table-cell>
          <table:table-cell office:value-type="string">
            <text:p>Lust Warriors - Chariot 4</text:p>
          </table:table-cell>
          <table:table-cell office:value-type="string">
            <text:p>Lust Warriors - Chariot 5</text:p>
          </table:table-cell>
          <table:table-cell table:number-columns-repeated="2"/>
        </table:table-row>
        <table:table-row table:style-name="ro1">
          <table:table-cell office:value-type="string">
            <text:p>Lust Warriors - Dragon 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Lust Warriors - Dragon 1</text:p>
          </table:table-cell>
          <table:table-cell office:value-type="string">
            <text:p>Lust Warriors - Dragon 2</text:p>
          </table:table-cell>
          <table:table-cell office:value-type="string">
            <text:p>Lust Warriors - Dragon 3</text:p>
          </table:table-cell>
          <table:table-cell office:value-type="string">
            <text:p>Lust Warriors - Dragon 4</text:p>
          </table:table-cell>
          <table:table-cell office:value-type="string">
            <text:p>Lust Warriors - Dragon 5</text:p>
          </table:table-cell>
          <table:table-cell office:value-type="string">
            <text:p>Lust Warriors - Dragon 6</text:p>
          </table:table-cell>
          <table:table-cell/>
        </table:table-row>
        <table:table-row table:style-name="ro1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6"/>
        </table:table-row>
        <table:table-row table:style-name="ro1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5"/>
        </table:table-row>
        <table:table-row table:style-name="ro1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3"/>
        </table:table-row>
        <table:table-row table:style-name="ro1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5"/>
        </table:table-row>
        <table:table-row table:style-name="ro1">
          <table:table-cell office:value-type="string">
            <text:p>Nukuja Warriors - Knight Etat-Major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Nukuja Warriors - Knight Etat-Major 1</text:p>
          </table:table-cell>
          <table:table-cell office:value-type="string">
            <text:p>Nukuja Warriors - Knight Etat-Major 2</text:p>
          </table:table-cell>
          <table:table-cell office:value-type="string">
            <text:p>Nukuja Warriors - Knight Etat-Major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x5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Nukuja Warriors - Knight x5 1</text:p>
          </table:table-cell>
          <table:table-cell office:value-type="string">
            <text:p>Nukuja Warriors - Knight x5 2</text:p>
          </table:table-cell>
          <table:table-cell office:value-type="string">
            <text:p>Nukuja Warriors - Knight x5 3</text:p>
          </table:table-cell>
          <table:table-cell table:number-columns-repeated="4"/>
        </table:table-row>
        <table:table-row table:style-name="ro1">
          <table:table-cell office:value-type="string">
            <text:p>Nukuja Warriors - Knight Hero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Nukuja Warriors - Knight Hero 1</text:p>
          </table:table-cell>
          <table:table-cell office:value-type="string">
            <text:p>Nukuja Warriors - Knight Hero 2</text:p>
          </table:table-cell>
          <table:table-cell office:value-type="string">
            <text:p>Nukuja Warriors - Knight Hero 3</text:p>
          </table:table-cell>
          <table:table-cell office:value-type="string">
            <text:p>Nukuja Warriors - Knight Hero 4</text:p>
          </table:table-cell>
          <table:table-cell table:number-columns-repeated="3"/>
        </table:table-row>
        <table:table-row table:style-name="ro1">
          <table:table-cell office:value-type="string">
            <text:p>Nukuja Warriors - Shrine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Shrine 1</text:p>
          </table:table-cell>
          <table:table-cell office:value-type="string">
            <text:p>Nukuja Warriors - Shrine 2</text:p>
          </table:table-cell>
          <table:table-cell office:value-type="string">
            <text:p>Nukuja Warriors - Shrine 3</text:p>
          </table:table-cell>
          <table:table-cell table:number-columns-repeated="4"/>
        </table:table-row>
        <table:table-row table:style-name="ro1">
          <table:table-cell office:value-type="string">
            <text:p>Nukuja Warriors - Chariot 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ukuja Warriors - Chariot 1</text:p>
          </table:table-cell>
          <table:table-cell office:value-type="string">
            <text:p>Nukuja Warriors - Chariot 2</text:p>
          </table:table-cell>
          <table:table-cell office:value-type="string">
            <text:p>Nukuja Warriors - Chariot 3</text:p>
          </table:table-cell>
          <table:table-cell table:number-columns-repeated="4"/>
        </table:table-row>
        <table:table-row table:style-name="ro1">
          <table:table-cell office:value-type="string">
            <text:p>Nukuja Warriors - Dragon 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Nukuja Warriors - Dragon 1</text:p>
          </table:table-cell>
          <table:table-cell office:value-type="string">
            <text:p>Nukuja Warriors - Dragon 2</text:p>
          </table:table-cell>
          <table:table-cell office:value-type="string">
            <text:p>Nukuja Warriors - Dragon 3</text:p>
          </table:table-cell>
          <table:table-cell office:value-type="string">
            <text:p>Nukuja Warriors - Dragon 4</text:p>
          </table:table-cell>
          <table:table-cell office:value-type="string">
            <text:p>Nukuja Warriors - Dragon 5</text:p>
          </table:table-cell>
          <table:table-cell table:number-columns-repeated="2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6"/>
        </table:table-row>
        <table:table-row table:style-name="ro1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3"/>
        </table:table-row>
        <table:table-row table:style-name="ro1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3"/>
        </table:table-row>
        <table:table-row table:style-name="ro2">
          <table:table-cell office:value-type="string">
            <text:p>Rotten Host - Infanterie Etat-Major alt </text:p>
          </table:table-cell>
          <table:table-cell office:value-type="currency" office:currency="EUR" office:value="8">
            <text:p>8,00 €</text:p>
          </table:table-cell>
          <table:table-cell table:number-columns-repeated="2"/>
          <table:table-cell office:value-type="string">
            <text:p>Rotten Host - Infanterie Etat-Major alt 1</text:p>
          </table:table-cell>
          <table:table-cell office:value-type="string">
            <text:p>Rotten Host - Infanterie Etat-Major alt 2</text:p>
          </table:table-cell>
          <table:table-cell office:value-type="string">
            <text:p>Rotten Host - Infanterie Etat-Major alt 3</text:p>
          </table:table-cell>
          <table:table-cell table:number-columns-repeated="4"/>
        </table:table-row>
        <table:table-row table:style-name="ro3">
          <table:table-cell office:value-type="string">
            <text:p>Rotten Host - Infanterie x10 alt </text:p>
          </table:table-cell>
          <table:table-cell office:value-type="currency" office:currency="EUR" office:value="28">
            <text:p>28,00 €</text:p>
          </table:table-cell>
          <table:table-cell table:number-columns-repeated="2"/>
          <table:table-cell office:value-type="string">
            <text:p>Rotten Host - Infanterie x10 alt 1</text:p>
          </table:table-cell>
          <table:table-cell office:value-type="string">
            <text:p>Rotten Host - Infanterie x10 alt 2</text:p>
          </table:table-cell>
          <table:table-cell office:value-type="string">
            <text:p>Rotten Host - Infanterie x10 alt 3</text:p>
          </table:table-cell>
          <table:table-cell office:value-type="string">
            <text:p>Rotten Host - Infanterie x10 alt 4</text:p>
          </table:table-cell>
          <table:table-cell office:value-type="string">
            <text:p>Rotten Host - Infanterie x10 alt 5</text:p>
          </table:table-cell>
          <table:table-cell office:value-type="string">
            <text:p>Rotten Host - Infanterie x10 alt 6</text:p>
          </table:table-cell>
          <table:table-cell/>
        </table:table-row>
        <table:table-row table:style-name="ro2">
          <table:table-cell office:value-type="string">
            <text:p>Rotten Host - Infanterie Etat-Major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Etat-Major alt 2 1</text:p>
          </table:table-cell>
          <table:table-cell office:value-type="string">
            <text:p>Rotten Host - Infanterie Etat-Major alt 2 2</text:p>
          </table:table-cell>
          <table:table-cell office:value-type="string">
            <text:p>Rotten Host - Infanterie Etat-Major alt 2 3</text:p>
          </table:table-cell>
          <table:table-cell table:number-columns-repeated="4"/>
        </table:table-row>
        <table:table-row table:style-name="ro2">
          <table:table-cell office:value-type="string">
            <text:p>Rotten Host - Infanterie x10 alt 2 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Rotten Host - Infanterie x10 alt 2 1</text:p>
          </table:table-cell>
          <table:table-cell office:value-type="string">
            <text:p>Rotten Host - Infanterie x10 alt 2 2</text:p>
          </table:table-cell>
          <table:table-cell office:value-type="string">
            <text:p>Rotten Host - Infanterie x10 alt 2 3</text:p>
          </table:table-cell>
          <table:table-cell office:value-type="string">
            <text:p>Rotten Host - Infanterie x10 alt 2 4</text:p>
          </table:table-cell>
          <table:table-cell office:value-type="string">
            <text:p>Rotten Host - Infanterie x10 alt 2 5</text:p>
          </table:table-cell>
          <table:table-cell office:value-type="string">
            <text:p>Rotten Host - Infanterie x10 alt 2 6</text:p>
          </table:table-cell>
          <table:table-cell/>
        </table:table-row>
        <table:table-row table:style-name="ro1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3"/>
        </table:table-row>
        <table:table-row table:style-name="ro2">
          <table:table-cell office:value-type="string">
            <text:p>Rotten Host - Hero alt 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Rotten Host - Hero alt 1</text:p>
          </table:table-cell>
          <table:table-cell office:value-type="string">
            <text:p>Rotten Host - Hero alt 2</text:p>
          </table:table-cell>
          <table:table-cell office:value-type="string">
            <text:p>Rotten Host - Hero alt 3</text:p>
          </table:table-cell>
          <table:table-cell table:number-columns-repeated="4"/>
        </table:table-row>
        <table:table-row table:style-name="ro2">
          <table:table-cell office:value-type="string">
            <text:p>Rotten Host - Sorceress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Rotten Host - Sorceress 1</text:p>
          </table:table-cell>
          <table:table-cell office:value-type="string">
            <text:p>Rotten Host - Sorceress 2</text:p>
          </table:table-cell>
          <table:table-cell office:value-type="string">
            <text:p>Rotten Host - Sorceress 3</text:p>
          </table:table-cell>
          <table:table-cell table:number-columns-repeated="4"/>
        </table:table-row>
        <table:table-row table:style-name="ro1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5"/>
        </table:table-row>
        <table:table-row table:style-name="ro1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4"/>
        </table:table-row>
        <table:table-row table:style-name="ro2">
          <table:table-cell office:value-type="string">
            <text:p>Rotten Host - Trolls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Rotten Host - Trolls 1</text:p>
          </table:table-cell>
          <table:table-cell office:value-type="string">
            <text:p>Rotten Host - Trolls 2</text:p>
          </table:table-cell>
          <table:table-cell office:value-type="string">
            <text:p>Rotten Host - Trolls 3</text:p>
          </table:table-cell>
          <table:table-cell table:number-columns-repeated="4"/>
        </table:table-row>
        <table:table-row table:style-name="ro2">
          <table:table-cell office:value-type="string">
            <text:p>Rotten Host - Trolls Etat-Major 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Rotten Host - Trolls Etat-Major 1</text:p>
          </table:table-cell>
          <table:table-cell office:value-type="string">
            <text:p>Rotten Host - Trolls Etat-Major 2</text:p>
          </table:table-cell>
          <table:table-cell office:value-type="string">
            <text:p>Rotten Host - Trolls Etat-Major 3</text:p>
          </table:table-cell>
          <table:table-cell table:number-columns-repeated="4"/>
        </table:table-row>
        <table:table-row table:style-name="ro1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3"/>
        </table:table-row>
        <table:table-row table:style-name="ro1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6"/>
        </table:table-row>
        <table:table-row table:style-name="ro1">
          <table:table-cell office:value-type="string">
            <text:p>Rotten Host - Shrine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Shrine 1</text:p>
          </table:table-cell>
          <table:table-cell office:value-type="string">
            <text:p>Rotten Host - Shrine 2</text:p>
          </table:table-cell>
          <table:table-cell office:value-type="string">
            <text:p>Rotten Host - Shrine 3</text:p>
          </table:table-cell>
          <table:table-cell office:value-type="string">
            <text:p>Rotten Host - Shrine 4</text:p>
          </table:table-cell>
          <table:table-cell table:number-columns-repeated="3"/>
        </table:table-row>
        <table:table-row table:style-name="ro1">
          <table:table-cell office:value-type="string">
            <text:p>Rotten Host - Chariot 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Rotten Host - Chariot 1</text:p>
          </table:table-cell>
          <table:table-cell office:value-type="string">
            <text:p>Rotten Host - Chariot 2</text:p>
          </table:table-cell>
          <table:table-cell office:value-type="string">
            <text:p>Rotten Host - Chariot 3</text:p>
          </table:table-cell>
          <table:table-cell office:value-type="string">
            <text:p>Rotten Host - Chariot 4</text:p>
          </table:table-cell>
          <table:table-cell table:number-columns-repeated="3"/>
        </table:table-row>
        <table:table-row table:style-name="ro1">
          <table:table-cell office:value-type="string">
            <text:p>Rotten Host - Spawn </text:p>
          </table:table-cell>
          <table:table-cell office:value-type="currency" office:currency="EUR" office:value="80">
            <text:p>80,00 €</text:p>
          </table:table-cell>
          <table:table-cell table:number-columns-repeated="2"/>
          <table:table-cell office:value-type="string">
            <text:p>Rotten Host - Spawn 1</text:p>
          </table:table-cell>
          <table:table-cell office:value-type="string">
            <text:p>Rotten Host - Spawn 2</text:p>
          </table:table-cell>
          <table:table-cell office:value-type="string">
            <text:p>Rotten Host - Spawn 3</text:p>
          </table:table-cell>
          <table:table-cell office:value-type="string">
            <text:p>Rotten Host - Spawn 4</text:p>
          </table:table-cell>
          <table:table-cell office:value-type="string">
            <text:p>Rotten Host - Spawn 5</text:p>
          </table:table-cell>
          <table:table-cell table:number-columns-repeated="2"/>
        </table:table-row>
        <table:table-row table:style-name="ro1">
          <table:table-cell office:value-type="string">
            <text:p>Rotten Host - Dragon 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Rotten Host - Dragon 1</text:p>
          </table:table-cell>
          <table:table-cell office:value-type="string">
            <text:p>Rotten Host - Dragon 2</text:p>
          </table:table-cell>
          <table:table-cell office:value-type="string">
            <text:p>Rotten Host - Dragon 3</text:p>
          </table:table-cell>
          <table:table-cell office:value-type="string">
            <text:p>Rotten Host - Dragon 4</text:p>
          </table:table-cell>
          <table:table-cell office:value-type="string">
            <text:p>Rotten Host - Dragon 5</text:p>
          </table:table-cell>
          <table:table-cell table:number-columns-repeated="2"/>
        </table:table-row>
        <table:table-row table:style-name="ro1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Heroin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4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5"/>
        </table:table-row>
        <table:table-row table:style-name="ro1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6"/>
        </table:table-row>
        <table:table-row table:style-name="ro1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Hero Scenique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6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4"/>
        </table:table-row>
        <table:table-row table:style-name="ro3">
          <table:table-cell office:value-type="string">
            <text:p>Warriors of the Dark God - Warriors Etat-Major 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Warriors of the Dark God - Warriors Etat-Major 1</text:p>
          </table:table-cell>
          <table:table-cell office:value-type="string">
            <text:p>Warriors of the Dark God - Warriors Etat-Major 2</text:p>
          </table:table-cell>
          <table:table-cell office:value-type="string">
            <text:p>Warriors of the Dark God - Warriors Etat-Major 3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Warriors x10 </text:p>
          </table:table-cell>
          <table:table-cell office:value-type="currency" office:currency="EUR" office:value="12">
            <text:p>12,00 €</text:p>
          </table:table-cell>
          <table:table-cell table:number-columns-repeated="2"/>
          <table:table-cell office:value-type="string">
            <text:p>Warriors of the Dark God - Warriors x10 1</text:p>
          </table:table-cell>
          <table:table-cell office:value-type="string">
            <text:p>Warriors of the Dark God - Warriors x10 2</text:p>
          </table:table-cell>
          <table:table-cell office:value-type="string">
            <text:p>Warriors of the Dark God - Warriors x10 3</text:p>
          </table:table-cell>
          <table:table-cell office:value-type="string">
            <text:p>Warriors of the Dark God - Warriors x10 4</text:p>
          </table:table-cell>
          <table:table-cell office:value-type="string">
            <text:p>Warriors of the Dark God - Warriors x10 5</text:p>
          </table:table-cell>
          <table:table-cell office:value-type="string">
            <text:p>Warriors of the Dark God - Warriors x10 6</text:p>
          </table:table-cell>
          <table:table-cell/>
        </table:table-row>
        <table:table-row table:style-name="ro2">
          <table:table-cell office:value-type="string">
            <text:p>Warriors of the Dark God - Warrior Hero 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Warriors of the Dark God - Warrior Hero 1</text:p>
          </table:table-cell>
          <table:table-cell office:value-type="string">
            <text:p>Warriors of the Dark God - Warrior Hero 2</text:p>
          </table:table-cell>
          <table:table-cell office:value-type="string">
            <text:p>Warriors of the Dark God - Warrior Hero 3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5"/>
        </table:table-row>
        <table:table-row table:style-name="ro3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5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5"/>
        </table:table-row>
        <table:table-row table:style-name="ro2">
          <table:table-cell office:value-type="string">
            <text:p>Warriors of the Dark God - Feldrak Etat-Major </text:p>
          </table:table-cell>
          <table:table-cell office:value-type="currency" office:currency="EUR" office:value="25">
            <text:p>25,00 €</text:p>
          </table:table-cell>
          <table:table-cell table:number-columns-repeated="2"/>
          <table:table-cell office:value-type="string">
            <text:p>Warriors of the Dark God - Feldrak Etat-Major 1</text:p>
          </table:table-cell>
          <table:table-cell office:value-type="string">
            <text:p>Warriors of the Dark God - Feldrak Etat-Major 2</text:p>
          </table:table-cell>
          <table:table-cell office:value-type="string">
            <text:p>Warriors of the Dark God - Feldrak Etat-Major 3</text:p>
          </table:table-cell>
          <table:table-cell office:value-type="string">
            <text:p>Warriors of the Dark God - Feldrak Etat-Major 4</text:p>
          </table:table-cell>
          <table:table-cell office:value-type="string">
            <text:p>Warriors of the Dark God - Feldrak Etat-Major 5</text:p>
          </table:table-cell>
          <table:table-cell office:value-type="string">
            <text:p>Warriors of the Dark God - Feldrak Etat-Major 6</text:p>
          </table:table-cell>
          <table:table-cell office:value-type="string">
            <text:p>Warriors of the Dark God - Feldrak Etat-Major 7</text:p>
          </table:table-cell>
        </table:table-row>
        <table:table-row table:style-name="ro2">
          <table:table-cell office:value-type="string">
            <text:p>Warriors of the Dark God - Feldrak x3 </text:p>
          </table:table-cell>
          <table:table-cell office:value-type="currency" office:currency="EUR" office:value="32">
            <text:p>32,00 €</text:p>
          </table:table-cell>
          <table:table-cell table:number-columns-repeated="2"/>
          <table:table-cell office:value-type="string">
            <text:p>Warriors of the Dark God - Feldrak x3 1</text:p>
          </table:table-cell>
          <table:table-cell office:value-type="string">
            <text:p>Warriors of the Dark God - Feldrak x3 2</text:p>
          </table:table-cell>
          <table:table-cell office:value-type="string">
            <text:p>Warriors of the Dark God - Feldrak x3 3</text:p>
          </table:table-cell>
          <table:table-cell office:value-type="string">
            <text:p>Warriors of the Dark God - Feldrak x3 4</text:p>
          </table:table-cell>
          <table:table-cell office:value-type="string">
            <text:p>Warriors of the Dark God - Feldrak x3 5</text:p>
          </table:table-cell>
          <table:table-cell office:value-type="string">
            <text:p>Warriors of the Dark God - Feldrak x3 6</text:p>
          </table:table-cell>
          <table:table-cell/>
        </table:table-row>
        <table:table-row table:style-name="ro2">
          <table:table-cell office:value-type="string">
            <text:p>Warrior of the Dark god - Hero Feldrak </text:p>
          </table:table-cell>
          <table:table-cell office:value-type="currency" office:currency="EUR" office:value="16">
            <text:p>16,00 €</text:p>
          </table:table-cell>
          <table:table-cell table:number-columns-repeated="2"/>
          <table:table-cell office:value-type="string">
            <text:p>Warrior of the Dark god - Hero Feldrak 1</text:p>
          </table:table-cell>
          <table:table-cell office:value-type="string">
            <text:p>Warrior of the Dark god - Hero Feldrak 2</text:p>
          </table:table-cell>
          <table:table-cell office:value-type="string">
            <text:p>Warrior of the Dark god - Hero Feldrak 3</text:p>
          </table:table-cell>
          <table:table-cell office:value-type="string">
            <text:p>Warrior of the Dark god - Hero Feldrak 4</text:p>
          </table:table-cell>
          <table:table-cell office:value-type="string">
            <text:p>Warrior of the Dark god - Hero Feldrak 5</text:p>
          </table:table-cell>
          <table:table-cell office:value-type="string">
            <text:p>Warrior of the Dark god - Hero Feldrak 6</text:p>
          </table:table-cell>
          <table:table-cell office:value-type="string">
            <text:p>Warrior of the Dark god - Hero Feldrak 7</text:p>
          </table:table-cell>
        </table:table-row>
        <table:table-row table:style-name="ro3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3"/>
        </table:table-row>
        <table:table-row table:style-name="ro3" table:number-rows-repeated="1048454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6">16/06/2026</text:date>, <text:time>22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16T22:55:03.02</dc:date>
    <dc:creator>Ycham Bounouar</dc:creator>
    <meta:editing-duration>PT1H42M29S</meta:editing-duration>
    <meta:editing-cycles>35</meta:editing-cycles>
    <meta:document-statistic meta:table-count="1" meta:cell-count="797" meta:object-count="0"/>
  </office:meta>
</office:document-meta>
</file>