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6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695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/>
        </table:table-row>
        <table:table-row table:style-name="ro1">
          <table:table-cell office:value-type="string">
            <text:p>Deamon Legions - Archicultist Blessed </text:p>
          </table:table-cell>
          <table:table-cell office:value-type="currency" office:currency="EUR" office:value="5">
            <text:p>5,00 €</text:p>
          </table:table-cell>
          <table:table-cell table:number-columns-repeated="2"/>
          <table:table-cell office:value-type="string">
            <text:p>Deamon Legions - Archicultist Blessed 1</text:p>
          </table:table-cell>
          <table:table-cell office:value-type="string">
            <text:p>Deamon Legions - Archicultist Blessed 2</text:p>
          </table:table-cell>
          <table:table-cell office:value-type="string">
            <text:p>Deamon Legions - Archicultist Blessed 3</text:p>
          </table:table-cell>
          <table:table-cell table:number-columns-repeated="4"/>
        </table:table-row>
        <table:table-row table:style-name="ro1">
          <table:table-cell office:value-type="string">
            <text:p>Deamon Legions - Archicultist Blessed 2 </text:p>
          </table:table-cell>
          <table:table-cell office:value-type="currency" office:currency="EUR" office:value="4">
            <text:p>4,00 €</text:p>
          </table:table-cell>
          <table:table-cell table:number-columns-repeated="2"/>
          <table:table-cell office:value-type="string">
            <text:p>Deamon Legions - Archicultist Blessed 2 1</text:p>
          </table:table-cell>
          <table:table-cell office:value-type="string">
            <text:p>Deamon Legions - Archicultist Blessed 2 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Deamon Legions - Archicultist Etat-Major 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Deamon Legions - Archicultist Etat-Major 1</text:p>
          </table:table-cell>
          <table:table-cell office:value-type="string">
            <text:p>Deamon Legions - Archicultist Etat-Major 2</text:p>
          </table:table-cell>
          <table:table-cell office:value-type="string">
            <text:p>Deamon Legions - Archicultist Etat-Major 3</text:p>
          </table:table-cell>
          <table:table-cell table:number-columns-repeated="4"/>
        </table:table-row>
        <table:table-row table:style-name="ro1">
          <table:table-cell office:value-type="string">
            <text:p>Deamon Legions - Archicultist x10 <text:s/>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Deamon Legions - Archicultist x10 <text:s/>1</text:p>
          </table:table-cell>
          <table:table-cell office:value-type="string">
            <text:p>Deamon Legions - Archicultist x10 <text:s/>2</text:p>
          </table:table-cell>
          <table:table-cell office:value-type="string">
            <text:p>Deamon Legions - Archicultist x10 <text:s/>3</text:p>
          </table:table-cell>
          <table:table-cell office:value-type="string">
            <text:p>Deamon Legions - Archicultist x10 <text:s/>4</text:p>
          </table:table-cell>
          <table:table-cell office:value-type="string">
            <text:p>Deamon Legions - Archicultist x10 <text:s/>5</text:p>
          </table:table-cell>
          <table:table-cell office:value-type="string">
            <text:p>Deamon Legions - Archicultist x10 <text:s/>6</text:p>
          </table:table-cell>
          <table:table-cell/>
        </table:table-row>
        <table:table-row table:style-name="ro1">
          <table:table-cell office:value-type="string">
            <text:p>Deamon Legions - Cfiend x3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Deamon Legions - Cfiend x3 1</text:p>
          </table:table-cell>
          <table:table-cell table:number-columns-repeated="6"/>
        </table:table-row>
        <table:table-row table:style-name="ro1">
          <table:table-cell office:value-type="string">
            <text:p>Deamon Legions - Courtesan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Deamon Legions - Courtesan 1</text:p>
          </table:table-cell>
          <table:table-cell table:number-columns-repeated="6"/>
        </table:table-row>
        <table:table-row table:style-name="ro1">
          <table:table-cell office:value-type="string">
            <text:p>Deamon Legions - Furies x5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Furies x5 1</text:p>
          </table:table-cell>
          <table:table-cell table:number-columns-repeated="6"/>
        </table:table-row>
        <table:table-row table:style-name="ro1">
          <table:table-cell office:value-type="string">
            <text:p>Deamon Legions - Hero Cfiend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Deamon Legions - Hero Cfiend 1</text:p>
          </table:table-cell>
          <table:table-cell office:value-type="string">
            <text:p>Deamon Legions - Hero Cfiend 2</text:p>
          </table:table-cell>
          <table:table-cell office:value-type="string">
            <text:p>Deamon Legions - Hero Cfiend 3</text:p>
          </table:table-cell>
          <table:table-cell table:number-columns-repeated="4"/>
        </table:table-row>
        <table:table-row table:style-name="ro1">
          <table:table-cell office:value-type="string">
            <text:p>Deamon Legions - Heroine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Heroine 1</text:p>
          </table:table-cell>
          <table:table-cell office:value-type="string">
            <text:p>Deamon Legions - Heroine 2</text:p>
          </table:table-cell>
          <table:table-cell office:value-type="string">
            <text:p>Deamon Legions - Heroine 3</text:p>
          </table:table-cell>
          <table:table-cell office:value-type="string">
            <text:p>Deamon Legions - Heroine 4</text:p>
          </table:table-cell>
          <table:table-cell table:number-columns-repeated="3"/>
        </table:table-row>
        <table:table-row table:style-name="ro1">
          <table:table-cell office:value-type="string">
            <text:p>Deamon Legions - Myrmidons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Myrmidons Etat-Major 1</text:p>
          </table:table-cell>
          <table:table-cell office:value-type="string">
            <text:p>Deamon Legions - Myrmidons Etat-Major 2</text:p>
          </table:table-cell>
          <table:table-cell table:number-columns-repeated="5"/>
        </table:table-row>
        <table:table-row table:style-name="ro1">
          <table:table-cell office:value-type="string">
            <text:p>Deamon Legions - Myrmidons Regiment x10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Myrmidons Regiment x10 1</text:p>
          </table:table-cell>
          <table:table-cell office:value-type="string">
            <text:p>Deamon Legions - Myrmidons Regiment x10 2</text:p>
          </table:table-cell>
          <table:table-cell table:number-columns-repeated="5"/>
        </table:table-row>
        <table:table-row table:style-name="ro1">
          <table:table-cell office:value-type="string">
            <text:p>Deamon Legions - Succubi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Succubi Etat-Major 1</text:p>
          </table:table-cell>
          <table:table-cell table:number-columns-repeated="6"/>
        </table:table-row>
        <table:table-row table:style-name="ro1">
          <table:table-cell office:value-type="string">
            <text:p>Deamon Legions - Succubi x10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Succubi x10 1</text:p>
          </table:table-cell>
          <table:table-cell office:value-type="string">
            <text:p>Deamon Legions - Succubi x10 2</text:p>
          </table:table-cell>
          <table:table-cell table:number-columns-repeated="5"/>
        </table:table-row>
        <table:table-row table:style-name="ro1">
          <table:table-cell office:value-type="string">
            <text:p>Deamon Legions - Sacrifice </text:p>
          </table:table-cell>
          <table:table-cell office:value-type="currency" office:currency="EUR" office:value="10">
            <text:p>10,00 €</text:p>
          </table:table-cell>
          <table:table-cell table:number-columns-repeated="2"/>
          <table:table-cell office:value-type="string">
            <text:p>Deamon Legions - Sacrifice 1</text:p>
          </table:table-cell>
          <table:table-cell office:value-type="string">
            <text:p>Deamon Legions - Sacrifice 2</text:p>
          </table:table-cell>
          <table:table-cell office:value-type="string">
            <text:p>Deamon Legions - Sacrifice 3</text:p>
          </table:table-cell>
          <table:table-cell table:number-columns-repeated="4"/>
        </table:table-row>
        <table:table-row table:style-name="ro1">
          <table:table-cell office:value-type="string">
            <text:p>Deamon Legions - Vanadra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Deamon Legions - Vanadra 1</text:p>
          </table:table-cell>
          <table:table-cell office:value-type="string">
            <text:p>Deamon Legions - Vanadra 2</text:p>
          </table:table-cell>
          <table:table-cell table:number-columns-repeated="5"/>
        </table:table-row>
        <table:table-row table:style-name="ro1">
          <table:table-cell office:value-type="string">
            <text:p>Deamon Legions - Babayaga </text:p>
          </table:table-cell>
          <table:table-cell office:value-type="currency" office:currency="EUR" office:value="100">
            <text:p>100,00 €</text:p>
          </table:table-cell>
          <table:table-cell table:number-columns-repeated="2"/>
          <table:table-cell office:value-type="string">
            <text:p>Deamon Legions - Babayaga 1</text:p>
          </table:table-cell>
          <table:table-cell office:value-type="string">
            <text:p>Deamon Legions - Babayaga 2</text:p>
          </table:table-cell>
          <table:table-cell office:value-type="string">
            <text:p>Deamon Legions - Babayaga 3</text:p>
          </table:table-cell>
          <table:table-cell office:value-type="string">
            <text:p>Deamon Legions - Babayaga 4</text:p>
          </table:table-cell>
          <table:table-cell office:value-type="string">
            <text:p>Deamon Legions - Babayaga 5</text:p>
          </table:table-cell>
          <table:table-cell office:value-type="string">
            <text:p>Deamon Legions - Babayaga 6</text:p>
          </table:table-cell>
          <table:table-cell/>
        </table:table-row>
        <table:table-row table:style-name="ro1">
          <table:table-cell office:value-type="string">
            <text:p>Dragon du Chaos</text:p>
          </table:table-cell>
          <table:table-cell office:value-type="currency" office:currency="EUR" office:value="150">
            <text:p>150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Dragon du Chaos 1</text:p>
          </table:table-cell>
          <table:table-cell office:value-type="string">
            <text:p>Dragon du Chaos 2</text:p>
          </table:table-cell>
          <table:table-cell table:number-columns-repeated="5"/>
        </table:table-row>
        <table:table-row table:style-name="ro1">
          <table:table-cell office:value-type="string">
            <text:p>Legion of Skull - Infanterie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Infanterie Etat-Major 1</text:p>
          </table:table-cell>
          <table:table-cell office:value-type="string">
            <text:p>Legion of Skull - Infanterie Etat-Major 2</text:p>
          </table:table-cell>
          <table:table-cell office:value-type="string">
            <text:p>Legion of Skull - Infanterie Etat-Major 3</text:p>
          </table:table-cell>
          <table:table-cell office:value-type="string">
            <text:p>Legion of Skull - Infanterie Etat-Major 4</text:p>
          </table:table-cell>
          <table:table-cell table:number-columns-repeated="3"/>
        </table:table-row>
        <table:table-row table:style-name="ro1">
          <table:table-cell office:value-type="string">
            <text:p>Legion of Skull - Infanterie x10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Infanterie x10 1</text:p>
          </table:table-cell>
          <table:table-cell office:value-type="string">
            <text:p>Legion of Skull - Infanterie x10 2</text:p>
          </table:table-cell>
          <table:table-cell office:value-type="string">
            <text:p>Legion of Skull - Infanterie x10 3</text:p>
          </table:table-cell>
          <table:table-cell office:value-type="string">
            <text:p>Legion of Skull - Infanterie x10 4</text:p>
          </table:table-cell>
          <table:table-cell table:number-columns-repeated="3"/>
        </table:table-row>
        <table:table-row table:style-name="ro1">
          <table:table-cell office:value-type="string">
            <text:p>Legion of Skull - Wolfs Infanterie Etat-Major 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Wolfs Infanterie Etat-Major 1</text:p>
          </table:table-cell>
          <table:table-cell office:value-type="string">
            <text:p>Legion of Skull - Wolfs Infanterie Etat-Major 2</text:p>
          </table:table-cell>
          <table:table-cell office:value-type="string">
            <text:p>Legion of Skull - Wolfs Infanterie Etat-Major 3</text:p>
          </table:table-cell>
          <table:table-cell table:number-columns-repeated="4"/>
        </table:table-row>
        <table:table-row table:style-name="ro1">
          <table:table-cell office:value-type="string">
            <text:p>Legion of Skull - Wolfs Infanterie x10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Wolfs Infanterie x10 1</text:p>
          </table:table-cell>
          <table:table-cell office:value-type="string">
            <text:p>Legion of Skull - Wolfs Infanterie x10 2</text:p>
          </table:table-cell>
          <table:table-cell office:value-type="string">
            <text:p>Legion of Skull - Wolfs Infanterie x10 3</text:p>
          </table:table-cell>
          <table:table-cell office:value-type="string">
            <text:p>Legion of Skull - Wolfs Infanterie x10 4</text:p>
          </table:table-cell>
          <table:table-cell office:value-type="string">
            <text:p>Legion of Skull - Wolfs Infanterie x10 5</text:p>
          </table:table-cell>
          <table:table-cell office:value-type="string">
            <text:p>Legion of Skull - Wolfs Infanterie x10 6</text:p>
          </table:table-cell>
          <table:table-cell/>
        </table:table-row>
        <table:table-row table:style-name="ro1">
          <table:table-cell office:value-type="string">
            <text:p>Legion of Skulls - Wolf Hero 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s - Wolf Hero 1</text:p>
          </table:table-cell>
          <table:table-cell office:value-type="string">
            <text:p>Legion of Skulls - Wolf Hero 2</text:p>
          </table:table-cell>
          <table:table-cell office:value-type="string">
            <text:p>Legion of Skulls - Wolf Hero 3</text:p>
          </table:table-cell>
          <table:table-cell table:number-columns-repeated="4"/>
        </table:table-row>
        <table:table-row table:style-name="ro1">
          <table:table-cell office:value-type="string">
            <text:p>Legion of Skull - Wolfs Etat-Major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Legion of Skull - Wolfs Etat-Major 1</text:p>
          </table:table-cell>
          <table:table-cell office:value-type="string">
            <text:p>Legion of Skull - Wolfs Etat-Major 2</text:p>
          </table:table-cell>
          <table:table-cell office:value-type="string">
            <text:p>Legion of Skull - Wolfs Etat-Major 3</text:p>
          </table:table-cell>
          <table:table-cell table:number-columns-repeated="4"/>
        </table:table-row>
        <table:table-row table:style-name="ro1">
          <table:table-cell office:value-type="string">
            <text:p>Legion of Skull - Wolfs x3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Legion of Skull - Wolfs x3 1</text:p>
          </table:table-cell>
          <table:table-cell office:value-type="string">
            <text:p>Legion of Skull - Wolfs x3 2</text:p>
          </table:table-cell>
          <table:table-cell office:value-type="string">
            <text:p>Legion of Skull - Wolfs x3 3</text:p>
          </table:table-cell>
          <table:table-cell table:number-columns-repeated="4"/>
        </table:table-row>
        <table:table-row table:style-name="ro1">
          <table:table-cell office:value-type="string">
            <text:p>Legion of Skull - Altar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Altar 1</text:p>
          </table:table-cell>
          <table:table-cell office:value-type="string">
            <text:p>Legion of Skull - Altar 2</text:p>
          </table:table-cell>
          <table:table-cell table:number-columns-repeated="5"/>
        </table:table-row>
        <table:table-row table:style-name="ro1">
          <table:table-cell office:value-type="string">
            <text:p>Legion of Skull - Brekolr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Legion of Skull - Brekolr 1</text:p>
          </table:table-cell>
          <table:table-cell office:value-type="string">
            <text:p>Legion of Skull - Brekolr 2</text:p>
          </table:table-cell>
          <table:table-cell table:number-columns-repeated="5"/>
        </table:table-row>
        <table:table-row table:style-name="ro1">
          <table:table-cell office:value-type="string">
            <text:p>Legion of Skull - Brekolr Scenique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Legion of Skull - Brekolr 1</text:p>
          </table:table-cell>
          <table:table-cell office:value-type="string">
            <text:p>Legion of Skull - Brekolr 2</text:p>
          </table:table-cell>
          <table:table-cell table:number-columns-repeated="5"/>
        </table:table-row>
        <table:table-row table:style-name="ro1">
          <table:table-cell office:value-type="string">
            <text:p>Legion of Skull - Cavalier Etat-Major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Cavalier Etat-Major 1</text:p>
          </table:table-cell>
          <table:table-cell office:value-type="string">
            <text:p>Legion of Skull - Cavalier Etat-Major 2</text:p>
          </table:table-cell>
          <table:table-cell office:value-type="string">
            <text:p>Legion of Skull - Cavalier Etat-Major 3</text:p>
          </table:table-cell>
          <table:table-cell table:number-columns-repeated="4"/>
        </table:table-row>
        <table:table-row table:style-name="ro1">
          <table:table-cell office:value-type="string">
            <text:p>Legion of Skull - Cavalier x5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Cavalier x5 1</text:p>
          </table:table-cell>
          <table:table-cell office:value-type="string">
            <text:p>Legion of Skull - Cavalier x5 2</text:p>
          </table:table-cell>
          <table:table-cell office:value-type="string">
            <text:p>Legion of Skull - Cavalier x5 3</text:p>
          </table:table-cell>
          <table:table-cell office:value-type="string">
            <text:p>Legion of Skull - Cavalier x5 4</text:p>
          </table:table-cell>
          <table:table-cell table:number-columns-repeated="3"/>
        </table:table-row>
        <table:table-row table:style-name="ro1">
          <table:table-cell office:value-type="string">
            <text:p>Legion of Skull - Chariot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Chariot 1</text:p>
          </table:table-cell>
          <table:table-cell office:value-type="string">
            <text:p>Legion of Skull - Chariot 2</text:p>
          </table:table-cell>
          <table:table-cell office:value-type="string">
            <text:p>Legion of Skull - Chariot 3</text:p>
          </table:table-cell>
          <table:table-cell office:value-type="string">
            <text:p>Legion of Skull - Chariot 4</text:p>
          </table:table-cell>
          <table:table-cell table:number-columns-repeated="3"/>
        </table:table-row>
        <table:table-row table:style-name="ro1">
          <table:table-cell office:value-type="string">
            <text:p>Legion of Skull - Elhag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Legion of Skull - Elhag 1</text:p>
          </table:table-cell>
          <table:table-cell office:value-type="string">
            <text:p>Legion of Skull - Elhag 2</text:p>
          </table:table-cell>
          <table:table-cell office:value-type="string">
            <text:p>Legion of Skull - Elhag 3</text:p>
          </table:table-cell>
          <table:table-cell office:value-type="string">
            <text:p>Legion of Skull - Elhag 4</text:p>
          </table:table-cell>
          <table:table-cell table:number-columns-repeated="3"/>
        </table:table-row>
        <table:table-row table:style-name="ro1">
          <table:table-cell office:value-type="string">
            <text:p>Legion of Skull - Hero Cavalie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Hero Cavalier 1</text:p>
          </table:table-cell>
          <table:table-cell office:value-type="string">
            <text:p>Legion of Skull - Hero Cavalier 2</text:p>
          </table:table-cell>
          <table:table-cell office:value-type="string">
            <text:p>Legion of Skull - Hero Cavalier 3</text:p>
          </table:table-cell>
          <table:table-cell table:number-columns-repeated="4"/>
        </table:table-row>
        <table:table-row table:style-name="ro1">
          <table:table-cell office:value-type="string">
            <text:p>Legion of Skull - Hero</text:p>
          </table:table-cell>
          <table:table-cell office:value-type="currency" office:currency="EUR" office:value="3.5">
            <text:p>3,5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Hero 1</text:p>
          </table:table-cell>
          <table:table-cell office:value-type="string">
            <text:p>Legion of Skull - Hero 2</text:p>
          </table:table-cell>
          <table:table-cell office:value-type="string">
            <text:p>Legion of Skull - Hero 3</text:p>
          </table:table-cell>
          <table:table-cell office:value-type="string">
            <text:p>Legion of Skull - Hero 4</text:p>
          </table:table-cell>
          <table:table-cell table:number-columns-repeated="3"/>
        </table:table-row>
        <table:table-row table:style-name="ro1">
          <table:table-cell office:value-type="string">
            <text:p>Legion of Skull - Gots </text:p>
          </table:table-cell>
          <table:table-cell office:value-type="currency" office:currency="EUR" office:value="50">
            <text:p>50,00 €</text:p>
          </table:table-cell>
          <table:table-cell table:number-columns-repeated="2"/>
          <table:table-cell office:value-type="string">
            <text:p>Legion of Skull - Gots 1</text:p>
          </table:table-cell>
          <table:table-cell office:value-type="string">
            <text:p>Legion of Skull - Gots 2</text:p>
          </table:table-cell>
          <table:table-cell office:value-type="string">
            <text:p>Legion of Skull - Gots 3</text:p>
          </table:table-cell>
          <table:table-cell office:value-type="string">
            <text:p>Legion of Skull - Gots 4</text:p>
          </table:table-cell>
          <table:table-cell office:value-type="string">
            <text:p>Legion of Skull - Gots 5</text:p>
          </table:table-cell>
          <table:table-cell office:value-type="string">
            <text:p>Legion of Skull - Gots 6</text:p>
          </table:table-cell>
          <table:table-cell/>
        </table:table-row>
        <table:table-row table:style-name="ro1">
          <table:table-cell office:value-type="string">
            <text:p>Legion of Skull - Lord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egion of Skull - Lord Sceni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egion of Skull - Lord with wing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egion of Skull - Lord with wing Scenique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ust Warriors - Regiment Etat-Major 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Etat-Major 1</text:p>
          </table:table-cell>
          <table:table-cell office:value-type="string">
            <text:p>Lust Warriors - Regiment Etat-Major 2</text:p>
          </table:table-cell>
          <table:table-cell office:value-type="string">
            <text:p>Lust Warriors - Regiment Etat-Major 3</text:p>
          </table:table-cell>
          <table:table-cell table:number-columns-repeated="4"/>
        </table:table-row>
        <table:table-row table:style-name="ro1">
          <table:table-cell office:value-type="string">
            <text:p>Lust Warriors - Regiment x10 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x10 1</text:p>
          </table:table-cell>
          <table:table-cell office:value-type="string">
            <text:p>Lust Warriors - Regiment x10 2</text:p>
          </table:table-cell>
          <table:table-cell office:value-type="string">
            <text:p>Lust Warriors - Regiment x10 3</text:p>
          </table:table-cell>
          <table:table-cell office:value-type="string">
            <text:p>Lust Warriors - Regiment x10 4</text:p>
          </table:table-cell>
          <table:table-cell office:value-type="string">
            <text:p>Lust Warriors - Regiment x10 5</text:p>
          </table:table-cell>
          <table:table-cell office:value-type="string">
            <text:p>Lust Warriors - Regiment x10 6</text:p>
          </table:table-cell>
          <table:table-cell/>
        </table:table-row>
        <table:table-row table:style-name="ro1">
          <table:table-cell office:value-type="string">
            <text:p>Lust Warriors - Regiment Etat-Major alt 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Etat-Major alt 1</text:p>
          </table:table-cell>
          <table:table-cell office:value-type="string">
            <text:p>Lust Warriors - Regiment Etat-Major alt 2</text:p>
          </table:table-cell>
          <table:table-cell office:value-type="string">
            <text:p>Lust Warriors - Regiment Etat-Major alt 3</text:p>
          </table:table-cell>
          <table:table-cell table:number-columns-repeated="4"/>
        </table:table-row>
        <table:table-row table:style-name="ro1">
          <table:table-cell office:value-type="string">
            <text:p>Lust Warriors - Regiment x10 alt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x10 alt 1</text:p>
          </table:table-cell>
          <table:table-cell office:value-type="string">
            <text:p>Lust Warriors - Regiment x10 alt 2</text:p>
          </table:table-cell>
          <table:table-cell office:value-type="string">
            <text:p>Lust Warriors - Regiment x10 alt 3</text:p>
          </table:table-cell>
          <table:table-cell office:value-type="string">
            <text:p>Lust Warriors - Regiment x10 alt 4</text:p>
          </table:table-cell>
          <table:table-cell office:value-type="string">
            <text:p>Lust Warriors - Regiment x10 alt 5</text:p>
          </table:table-cell>
          <table:table-cell office:value-type="string">
            <text:p>Lust Warriors - Regiment x10 alt 6</text:p>
          </table:table-cell>
          <table:table-cell/>
        </table:table-row>
        <table:table-row table:style-name="ro1">
          <table:table-cell office:value-type="string">
            <text:p>Lust Warriors - Hero 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Lust Warriors - Hero 1</text:p>
          </table:table-cell>
          <table:table-cell office:value-type="string">
            <text:p>Lust Warriors - Hero 2</text:p>
          </table:table-cell>
          <table:table-cell office:value-type="string">
            <text:p>Lust Warriors - Hero 3</text:p>
          </table:table-cell>
          <table:table-cell office:value-type="string">
            <text:p>Lust Warriors - Hero 4</text:p>
          </table:table-cell>
          <table:table-cell office:value-type="string">
            <text:p>Lust Warriors - Hero 5</text:p>
          </table:table-cell>
          <table:table-cell office:value-type="string">
            <text:p>Lust Warriors - Hero 6</text:p>
          </table:table-cell>
          <table:table-cell/>
        </table:table-row>
        <table:table-row table:style-name="ro1">
          <table:table-cell office:value-type="string">
            <text:p>Lust Warriors - Clair </text:p>
          </table:table-cell>
          <table:table-cell office:value-type="currency" office:currency="EUR" office:value="4">
            <text:p>4,00 €</text:p>
          </table:table-cell>
          <table:table-cell table:number-columns-repeated="2"/>
          <table:table-cell office:value-type="string">
            <text:p>Lust Warriors - Clair 1</text:p>
          </table:table-cell>
          <table:table-cell office:value-type="string">
            <text:p>Lust Warriors - Clair 2</text:p>
          </table:table-cell>
          <table:table-cell office:value-type="string">
            <text:p>Lust Warriors - Clair 3</text:p>
          </table:table-cell>
          <table:table-cell office:value-type="string">
            <text:p>Lust Warriors - Clair 4</text:p>
          </table:table-cell>
          <table:table-cell table:number-columns-repeated="3"/>
        </table:table-row>
        <table:table-row table:style-name="ro1">
          <table:table-cell office:value-type="string">
            <text:p>Lust Warriors - Alize 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Lust Warriors - Alize 1</text:p>
          </table:table-cell>
          <table:table-cell office:value-type="string">
            <text:p>Lust Warriors - Alize 2</text:p>
          </table:table-cell>
          <table:table-cell office:value-type="string">
            <text:p>Lust Warriors - Alize 3</text:p>
          </table:table-cell>
          <table:table-cell office:value-type="string">
            <text:p>Lust Warriors - Alize 4</text:p>
          </table:table-cell>
          <table:table-cell table:number-columns-repeated="3"/>
        </table:table-row>
        <table:table-row table:style-name="ro1">
          <table:table-cell office:value-type="string">
            <text:p>Lust Warriors - Path </text:p>
          </table:table-cell>
          <table:table-cell office:value-type="currency" office:currency="EUR" office:value="10">
            <text:p>10,00 €</text:p>
          </table:table-cell>
          <table:table-cell table:number-columns-repeated="2"/>
          <table:table-cell office:value-type="string">
            <text:p>Lust Warriors - Path 1</text:p>
          </table:table-cell>
          <table:table-cell office:value-type="string">
            <text:p>Lust Warriors - Path 2</text:p>
          </table:table-cell>
          <table:table-cell office:value-type="string">
            <text:p>Lust Warriors - Path 3</text:p>
          </table:table-cell>
          <table:table-cell office:value-type="string">
            <text:p>Lust Warriors - Path 4</text:p>
          </table:table-cell>
          <table:table-cell office:value-type="string">
            <text:p>Lust Warriors - Path 5</text:p>
          </table:table-cell>
          <table:table-cell office:value-type="string">
            <text:p>Lust Warriors - Path 6</text:p>
          </table:table-cell>
          <table:table-cell/>
        </table:table-row>
        <table:table-row table:style-name="ro1">
          <table:table-cell office:value-type="string">
            <text:p>Lust Warriors - Shrine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ust Warriors - Shrine 1</text:p>
          </table:table-cell>
          <table:table-cell office:value-type="string">
            <text:p>Lust Warriors - Shrine 2</text:p>
          </table:table-cell>
          <table:table-cell office:value-type="string">
            <text:p>Lust Warriors - Shrine 3</text:p>
          </table:table-cell>
          <table:table-cell office:value-type="string">
            <text:p>Lust Warriors - Shrine 4</text:p>
          </table:table-cell>
          <table:table-cell table:number-columns-repeated="3"/>
        </table:table-row>
        <table:table-row table:style-name="ro1">
          <table:table-cell office:value-type="string">
            <text:p>Lust Warriors - Chariot 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ust Warriors - Chariot 1</text:p>
          </table:table-cell>
          <table:table-cell office:value-type="string">
            <text:p>Lust Warriors - Chariot 2</text:p>
          </table:table-cell>
          <table:table-cell office:value-type="string">
            <text:p>Lust Warriors - Chariot 3</text:p>
          </table:table-cell>
          <table:table-cell office:value-type="string">
            <text:p>Lust Warriors - Chariot 4</text:p>
          </table:table-cell>
          <table:table-cell office:value-type="string">
            <text:p>Lust Warriors - Chariot 5</text:p>
          </table:table-cell>
          <table:table-cell table:number-columns-repeated="2"/>
        </table:table-row>
        <table:table-row table:style-name="ro1">
          <table:table-cell office:value-type="string">
            <text:p>Lust Warriors - Dragon </text:p>
          </table:table-cell>
          <table:table-cell office:value-type="currency" office:currency="EUR" office:value="51">
            <text:p>51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Lust Warriors - Dragon 1</text:p>
          </table:table-cell>
          <table:table-cell office:value-type="string">
            <text:p>Lust Warriors - Dragon 2</text:p>
          </table:table-cell>
          <table:table-cell office:value-type="string">
            <text:p>Lust Warriors - Dragon 3</text:p>
          </table:table-cell>
          <table:table-cell office:value-type="string">
            <text:p>Lust Warriors - Dragon 4</text:p>
          </table:table-cell>
          <table:table-cell office:value-type="string">
            <text:p>Lust Warriors - Dragon 5</text:p>
          </table:table-cell>
          <table:table-cell office:value-type="string">
            <text:p>Lust Warriors - Dragon 6</text:p>
          </table:table-cell>
          <table:table-cell/>
        </table:table-row>
        <table:table-row table:style-name="ro1">
          <table:table-cell office:value-type="string">
            <text:p>Nukuja Warriors - Chosen Etat-Major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Chosen Etat-Major 1</text:p>
          </table:table-cell>
          <table:table-cell table:number-columns-repeated="6"/>
        </table:table-row>
        <table:table-row table:style-name="ro1">
          <table:table-cell office:value-type="string">
            <text:p>Nukuja Warriors - Chosen x10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Chosen x10 1</text:p>
          </table:table-cell>
          <table:table-cell office:value-type="string">
            <text:p>Nukuja Warriors - Chosen x10 2</text:p>
          </table:table-cell>
          <table:table-cell table:number-columns-repeated="5"/>
        </table:table-row>
        <table:table-row table:style-name="ro1">
          <table:table-cell office:value-type="string">
            <text:p>Nukuja Warriors - Exalted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Nukuja Warriors - Exalted 1</text:p>
          </table:table-cell>
          <table:table-cell office:value-type="string">
            <text:p>Nukuja Warriors - Exalted 2</text:p>
          </table:table-cell>
          <table:table-cell office:value-type="string">
            <text:p>Nukuja Warriors - Exalted 3</text:p>
          </table:table-cell>
          <table:table-cell office:value-type="string">
            <text:p>Nukuja Warriors - Exalted 4</text:p>
          </table:table-cell>
          <table:table-cell table:number-columns-repeated="3"/>
        </table:table-row>
        <table:table-row table:style-name="ro1">
          <table:table-cell office:value-type="string">
            <text:p>Nukuja Warriors - Hero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Hero 1</text:p>
          </table:table-cell>
          <table:table-cell office:value-type="string">
            <text:p>Nukuja Warriors - Hero 2</text:p>
          </table:table-cell>
          <table:table-cell office:value-type="string">
            <text:p>Nukuja Warriors - Hero 3</text:p>
          </table:table-cell>
          <table:table-cell office:value-type="string">
            <text:p>Nukuja Warriors - Hero 4</text:p>
          </table:table-cell>
          <table:table-cell table:number-columns-repeated="3"/>
        </table:table-row>
        <table:table-row table:style-name="ro1">
          <table:table-cell office:value-type="string">
            <text:p>Nukuja Warriors - Sorceress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Sorceress 1</text:p>
          </table:table-cell>
          <table:table-cell office:value-type="string">
            <text:p>Nukuja Warriors - Sorceress 2</text:p>
          </table:table-cell>
          <table:table-cell table:number-columns-repeated="5"/>
        </table:table-row>
        <table:table-row table:style-name="ro1">
          <table:table-cell office:value-type="string">
            <text:p>Nukuja Warriors - Knight Etat-Major </text:p>
          </table:table-cell>
          <table:table-cell office:value-type="currency" office:currency="EUR" office:value="17">
            <text:p>17,00 €</text:p>
          </table:table-cell>
          <table:table-cell table:number-columns-repeated="2"/>
          <table:table-cell office:value-type="string">
            <text:p>Nukuja Warriors - Knight Etat-Major 1</text:p>
          </table:table-cell>
          <table:table-cell office:value-type="string">
            <text:p>Nukuja Warriors - Knight Etat-Major 2</text:p>
          </table:table-cell>
          <table:table-cell office:value-type="string">
            <text:p>Nukuja Warriors - Knight Etat-Major 3</text:p>
          </table:table-cell>
          <table:table-cell table:number-columns-repeated="4"/>
        </table:table-row>
        <table:table-row table:style-name="ro1">
          <table:table-cell office:value-type="string">
            <text:p>Nukuja Warriors - Knight x5 </text:p>
          </table:table-cell>
          <table:table-cell office:value-type="currency" office:currency="EUR" office:value="28">
            <text:p>28,00 €</text:p>
          </table:table-cell>
          <table:table-cell table:number-columns-repeated="2"/>
          <table:table-cell office:value-type="string">
            <text:p>Nukuja Warriors - Knight x5 1</text:p>
          </table:table-cell>
          <table:table-cell office:value-type="string">
            <text:p>Nukuja Warriors - Knight x5 2</text:p>
          </table:table-cell>
          <table:table-cell office:value-type="string">
            <text:p>Nukuja Warriors - Knight x5 3</text:p>
          </table:table-cell>
          <table:table-cell table:number-columns-repeated="4"/>
        </table:table-row>
        <table:table-row table:style-name="ro1">
          <table:table-cell office:value-type="string">
            <text:p>Nukuja Warriors - Knight Hero 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Nukuja Warriors - Knight Hero 1</text:p>
          </table:table-cell>
          <table:table-cell office:value-type="string">
            <text:p>Nukuja Warriors - Knight Hero 2</text:p>
          </table:table-cell>
          <table:table-cell office:value-type="string">
            <text:p>Nukuja Warriors - Knight Hero 3</text:p>
          </table:table-cell>
          <table:table-cell office:value-type="string">
            <text:p>Nukuja Warriors - Knight Hero 4</text:p>
          </table:table-cell>
          <table:table-cell table:number-columns-repeated="3"/>
        </table:table-row>
        <table:table-row table:style-name="ro1">
          <table:table-cell office:value-type="string">
            <text:p>Nukuja Warriors - Shrine 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Nukuja Warriors - Shrine 1</text:p>
          </table:table-cell>
          <table:table-cell office:value-type="string">
            <text:p>Nukuja Warriors - Shrine 2</text:p>
          </table:table-cell>
          <table:table-cell office:value-type="string">
            <text:p>Nukuja Warriors - Shrine 3</text:p>
          </table:table-cell>
          <table:table-cell table:number-columns-repeated="4"/>
        </table:table-row>
        <table:table-row table:style-name="ro1">
          <table:table-cell office:value-type="string">
            <text:p>Nukuja Warriors - Chariot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Nukuja Warriors - Chariot 1</text:p>
          </table:table-cell>
          <table:table-cell office:value-type="string">
            <text:p>Nukuja Warriors - Chariot 2</text:p>
          </table:table-cell>
          <table:table-cell office:value-type="string">
            <text:p>Nukuja Warriors - Chariot 3</text:p>
          </table:table-cell>
          <table:table-cell table:number-columns-repeated="4"/>
        </table:table-row>
        <table:table-row table:style-name="ro1">
          <table:table-cell office:value-type="string">
            <text:p>Nukuja Warriors - Dragon </text:p>
          </table:table-cell>
          <table:table-cell office:value-type="currency" office:currency="EUR" office:value="65">
            <text:p>65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Nukuja Warriors - Dragon 1</text:p>
          </table:table-cell>
          <table:table-cell office:value-type="string">
            <text:p>Nukuja Warriors - Dragon 2</text:p>
          </table:table-cell>
          <table:table-cell office:value-type="string">
            <text:p>Nukuja Warriors - Dragon 3</text:p>
          </table:table-cell>
          <table:table-cell office:value-type="string">
            <text:p>Nukuja Warriors - Dragon 4</text:p>
          </table:table-cell>
          <table:table-cell office:value-type="string">
            <text:p>Nukuja Warriors - Dragon 5</text:p>
          </table:table-cell>
          <table:table-cell table:number-columns-repeated="2"/>
        </table:table-row>
        <table:table-row table:style-name="ro1">
          <table:table-cell office:value-type="string">
            <text:p>Rotten Host - 3reyes</text:p>
          </table:table-cell>
          <table:table-cell office:value-type="currency" office:currency="EUR" office:value="45">
            <text:p>45,00 €</text:p>
          </table:table-cell>
          <table:table-cell/>
          <table:table-cell office:value-type="string">
            <text:p>130 mm</text:p>
          </table:table-cell>
          <table:table-cell office:value-type="string">
            <text:p>Rotten Host - 3reyes 1</text:p>
          </table:table-cell>
          <table:table-cell table:number-columns-repeated="6"/>
        </table:table-row>
        <table:table-row table:style-name="ro1">
          <table:table-cell office:value-type="string">
            <text:p>Rotten Host - Cavalier Etat-Major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Cavalier Etat-Major 1</text:p>
          </table:table-cell>
          <table:table-cell office:value-type="string">
            <text:p>Rotten Host - Cavalier Etat-Major 2</text:p>
          </table:table-cell>
          <table:table-cell office:value-type="string">
            <text:p>Rotten Host - Cavalier Etat-Major 3</text:p>
          </table:table-cell>
          <table:table-cell office:value-type="string">
            <text:p>Rotten Host - Cavalier Etat-Major 4</text:p>
          </table:table-cell>
          <table:table-cell table:number-columns-repeated="3"/>
        </table:table-row>
        <table:table-row table:style-name="ro1">
          <table:table-cell office:value-type="string">
            <text:p>Rotten Host - Cavalier x5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Cavalier x5 1</text:p>
          </table:table-cell>
          <table:table-cell office:value-type="string">
            <text:p>Rotten Host - Cavalier x5 2</text:p>
          </table:table-cell>
          <table:table-cell office:value-type="string">
            <text:p>Rotten Host - Cavalier x5 3</text:p>
          </table:table-cell>
          <table:table-cell office:value-type="string">
            <text:p>Rotten Host - Cavalier x5 4</text:p>
          </table:table-cell>
          <table:table-cell table:number-columns-repeated="3"/>
        </table:table-row>
        <table:table-row table:style-name="ro1">
          <table:table-cell office:value-type="string">
            <text:p>Rotten Host -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Etat-Major 1</text:p>
          </table:table-cell>
          <table:table-cell office:value-type="string">
            <text:p>Rotten Host - Etat-Major 2</text:p>
          </table:table-cell>
          <table:table-cell office:value-type="string">
            <text:p>Rotten Host - Etat-Major 3</text:p>
          </table:table-cell>
          <table:table-cell office:value-type="string">
            <text:p>Rotten Host - Etat-Major 4</text:p>
          </table:table-cell>
          <table:table-cell table:number-columns-repeated="3"/>
        </table:table-row>
        <table:table-row table:style-name="ro1">
          <table:table-cell office:value-type="string">
            <text:p>Rotten Host - Regiment x10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Regiment x10 1</text:p>
          </table:table-cell>
          <table:table-cell office:value-type="string">
            <text:p>Rotten Host - Regiment x10 2</text:p>
          </table:table-cell>
          <table:table-cell office:value-type="string">
            <text:p>Rotten Host - Regiment x10 3</text:p>
          </table:table-cell>
          <table:table-cell office:value-type="string">
            <text:p>Rotten Host - Regiment x10 4</text:p>
          </table:table-cell>
          <table:table-cell table:number-columns-repeated="3"/>
        </table:table-row>
        <table:table-row table:style-name="ro2">
          <table:table-cell office:value-type="string">
            <text:p>Rotten Host - Infanterie Etat-Major alt 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Rotten Host - Infanterie Etat-Major alt 1</text:p>
          </table:table-cell>
          <table:table-cell office:value-type="string">
            <text:p>Rotten Host - Infanterie Etat-Major alt 2</text:p>
          </table:table-cell>
          <table:table-cell office:value-type="string">
            <text:p>Rotten Host - Infanterie Etat-Major alt 3</text:p>
          </table:table-cell>
          <table:table-cell table:number-columns-repeated="4"/>
        </table:table-row>
        <table:table-row table:style-name="ro3">
          <table:table-cell office:value-type="string">
            <text:p>Rotten Host - Infanterie x10 alt </text:p>
          </table:table-cell>
          <table:table-cell office:value-type="currency" office:currency="EUR" office:value="28">
            <text:p>28,00 €</text:p>
          </table:table-cell>
          <table:table-cell table:number-columns-repeated="2"/>
          <table:table-cell office:value-type="string">
            <text:p>Rotten Host - Infanterie x10 alt 1</text:p>
          </table:table-cell>
          <table:table-cell office:value-type="string">
            <text:p>Rotten Host - Infanterie x10 alt 2</text:p>
          </table:table-cell>
          <table:table-cell office:value-type="string">
            <text:p>Rotten Host - Infanterie x10 alt 3</text:p>
          </table:table-cell>
          <table:table-cell office:value-type="string">
            <text:p>Rotten Host - Infanterie x10 alt 4</text:p>
          </table:table-cell>
          <table:table-cell office:value-type="string">
            <text:p>Rotten Host - Infanterie x10 alt 5</text:p>
          </table:table-cell>
          <table:table-cell office:value-type="string">
            <text:p>Rotten Host - Infanterie x10 alt 6</text:p>
          </table:table-cell>
          <table:table-cell/>
        </table:table-row>
        <table:table-row table:style-name="ro2">
          <table:table-cell office:value-type="string">
            <text:p>Rotten Host - Infanterie Etat-Major alt 2 </text:p>
          </table:table-cell>
          <table:table-cell office:value-type="currency" office:currency="EUR" office:value="17">
            <text:p>17,00 €</text:p>
          </table:table-cell>
          <table:table-cell table:number-columns-repeated="2"/>
          <table:table-cell office:value-type="string">
            <text:p>Rotten Host - Infanterie Etat-Major alt 2 1</text:p>
          </table:table-cell>
          <table:table-cell office:value-type="string">
            <text:p>Rotten Host - Infanterie Etat-Major alt 2 2</text:p>
          </table:table-cell>
          <table:table-cell office:value-type="string">
            <text:p>Rotten Host - Infanterie Etat-Major alt 2 3</text:p>
          </table:table-cell>
          <table:table-cell table:number-columns-repeated="4"/>
        </table:table-row>
        <table:table-row table:style-name="ro2">
          <table:table-cell office:value-type="string">
            <text:p>Rotten Host - Infanterie x10 alt 2 </text:p>
          </table:table-cell>
          <table:table-cell office:value-type="currency" office:currency="EUR" office:value="17">
            <text:p>17,00 €</text:p>
          </table:table-cell>
          <table:table-cell table:number-columns-repeated="2"/>
          <table:table-cell office:value-type="string">
            <text:p>Rotten Host - Infanterie x10 alt 2 1</text:p>
          </table:table-cell>
          <table:table-cell office:value-type="string">
            <text:p>Rotten Host - Infanterie x10 alt 2 2</text:p>
          </table:table-cell>
          <table:table-cell office:value-type="string">
            <text:p>Rotten Host - Infanterie x10 alt 2 3</text:p>
          </table:table-cell>
          <table:table-cell office:value-type="string">
            <text:p>Rotten Host - Infanterie x10 alt 2 4</text:p>
          </table:table-cell>
          <table:table-cell office:value-type="string">
            <text:p>Rotten Host - Infanterie x10 alt 2 5</text:p>
          </table:table-cell>
          <table:table-cell office:value-type="string">
            <text:p>Rotten Host - Infanterie x10 alt 2 6</text:p>
          </table:table-cell>
          <table:table-cell/>
        </table:table-row>
        <table:table-row table:style-name="ro1">
          <table:table-cell office:value-type="string">
            <text:p>Rotten Host - Hero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Hero 1</text:p>
          </table:table-cell>
          <table:table-cell office:value-type="string">
            <text:p>Rotten Host - Hero 2</text:p>
          </table:table-cell>
          <table:table-cell office:value-type="string">
            <text:p>Rotten Host - Hero 3</text:p>
          </table:table-cell>
          <table:table-cell office:value-type="string">
            <text:p>Rotten Host - Hero 4</text:p>
          </table:table-cell>
          <table:table-cell table:number-columns-repeated="3"/>
        </table:table-row>
        <table:table-row table:style-name="ro2">
          <table:table-cell office:value-type="string">
            <text:p>Rotten Host - Hero alt </text:p>
          </table:table-cell>
          <table:table-cell office:value-type="currency" office:currency="EUR" office:value="6">
            <text:p>6,00 €</text:p>
          </table:table-cell>
          <table:table-cell table:number-columns-repeated="2"/>
          <table:table-cell office:value-type="string">
            <text:p>Rotten Host - Hero alt 1</text:p>
          </table:table-cell>
          <table:table-cell office:value-type="string">
            <text:p>Rotten Host - Hero alt 2</text:p>
          </table:table-cell>
          <table:table-cell office:value-type="string">
            <text:p>Rotten Host - Hero alt 3</text:p>
          </table:table-cell>
          <table:table-cell table:number-columns-repeated="4"/>
        </table:table-row>
        <table:table-row table:style-name="ro2">
          <table:table-cell office:value-type="string">
            <text:p>Rotten Host - Sorceress 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Rotten Host - Sorceress 1</text:p>
          </table:table-cell>
          <table:table-cell office:value-type="string">
            <text:p>Rotten Host - Sorceress 2</text:p>
          </table:table-cell>
          <table:table-cell office:value-type="string">
            <text:p>Rotten Host - Sorceress 3</text:p>
          </table:table-cell>
          <table:table-cell table:number-columns-repeated="4"/>
        </table:table-row>
        <table:table-row table:style-name="ro1">
          <table:table-cell office:value-type="string">
            <text:p>Rotten Host - Klous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100x150 mm</text:p>
          </table:table-cell>
          <table:table-cell office:value-type="string">
            <text:p>110x75 mm</text:p>
          </table:table-cell>
          <table:table-cell office:value-type="string">
            <text:p>Rotten Host - Klous 1</text:p>
          </table:table-cell>
          <table:table-cell office:value-type="string">
            <text:p>Rotten Host - Klous 2</text:p>
          </table:table-cell>
          <table:table-cell table:number-columns-repeated="5"/>
        </table:table-row>
        <table:table-row table:style-name="ro1">
          <table:table-cell office:value-type="string">
            <text:p>Rotten Host - Klous Scenique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100x150 mm</text:p>
          </table:table-cell>
          <table:table-cell office:value-type="string">
            <text:p>110x75 mm</text:p>
          </table:table-cell>
          <table:table-cell office:value-type="string">
            <text:p>Rotten Host - Klous 1</text:p>
          </table:table-cell>
          <table:table-cell office:value-type="string">
            <text:p>Rotten Host - Klous 2</text:p>
          </table:table-cell>
          <table:table-cell table:number-columns-repeated="5"/>
        </table:table-row>
        <table:table-row table:style-name="ro1">
          <table:table-cell office:value-type="string">
            <text:p>Rotten Host - Prince Demon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Rotten Host - Prince Demon 1</text:p>
          </table:table-cell>
          <table:table-cell office:value-type="string">
            <text:p>Rotten Host - Prince Demon 2</text:p>
          </table:table-cell>
          <table:table-cell office:value-type="string">
            <text:p>Rotten Host - Prince Demon 3</text:p>
          </table:table-cell>
          <table:table-cell table:number-columns-repeated="4"/>
        </table:table-row>
        <table:table-row table:style-name="ro2">
          <table:table-cell office:value-type="string">
            <text:p>Rotten Host - Trolls </text:p>
          </table:table-cell>
          <table:table-cell office:value-type="currency" office:currency="EUR" office:value="12">
            <text:p>12,00 €</text:p>
          </table:table-cell>
          <table:table-cell table:number-columns-repeated="2"/>
          <table:table-cell office:value-type="string">
            <text:p>Rotten Host - Trolls 1</text:p>
          </table:table-cell>
          <table:table-cell office:value-type="string">
            <text:p>Rotten Host - Trolls 2</text:p>
          </table:table-cell>
          <table:table-cell office:value-type="string">
            <text:p>Rotten Host - Trolls 3</text:p>
          </table:table-cell>
          <table:table-cell table:number-columns-repeated="4"/>
        </table:table-row>
        <table:table-row table:style-name="ro2">
          <table:table-cell office:value-type="string">
            <text:p>Rotten Host - Trolls Etat-Major </text:p>
          </table:table-cell>
          <table:table-cell office:value-type="currency" office:currency="EUR" office:value="15">
            <text:p>15,00 €</text:p>
          </table:table-cell>
          <table:table-cell table:number-columns-repeated="2"/>
          <table:table-cell office:value-type="string">
            <text:p>Rotten Host - Trolls Etat-Major 1</text:p>
          </table:table-cell>
          <table:table-cell office:value-type="string">
            <text:p>Rotten Host - Trolls Etat-Major 2</text:p>
          </table:table-cell>
          <table:table-cell office:value-type="string">
            <text:p>Rotten Host - Trolls Etat-Major 3</text:p>
          </table:table-cell>
          <table:table-cell table:number-columns-repeated="4"/>
        </table:table-row>
        <table:table-row table:style-name="ro1">
          <table:table-cell office:value-type="string">
            <text:p>Rotten Host - Volnir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50x75 mm</text:p>
          </table:table-cell>
          <table:table-cell office:value-type="string">
            <text:p>90x52 mm</text:p>
          </table:table-cell>
          <table:table-cell office:value-type="string">
            <text:p>Rotten Host - Volnir 1</text:p>
          </table:table-cell>
          <table:table-cell office:value-type="string">
            <text:p>Rotten Host - Volnir 2</text:p>
          </table:table-cell>
          <table:table-cell office:value-type="string">
            <text:p>Rotten Host - Volnir 3</text:p>
          </table:table-cell>
          <table:table-cell office:value-type="string">
            <text:p>Rotten Host - Volnir 4</text:p>
          </table:table-cell>
          <table:table-cell table:number-columns-repeated="3"/>
        </table:table-row>
        <table:table-row table:style-name="ro1">
          <table:table-cell office:value-type="string">
            <text:p>Rotten Host - Wolfs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Wolfs 1</text:p>
          </table:table-cell>
          <table:table-cell table:number-columns-repeated="6"/>
        </table:table-row>
        <table:table-row table:style-name="ro1">
          <table:table-cell office:value-type="string">
            <text:p>Rotten Host - Shrine </text:p>
          </table:table-cell>
          <table:table-cell office:value-type="currency" office:currency="EUR" office:value="20">
            <text:p>20,00 €</text:p>
          </table:table-cell>
          <table:table-cell table:number-columns-repeated="2"/>
          <table:table-cell office:value-type="string">
            <text:p>Rotten Host - Shrine 1</text:p>
          </table:table-cell>
          <table:table-cell office:value-type="string">
            <text:p>Rotten Host - Shrine 2</text:p>
          </table:table-cell>
          <table:table-cell office:value-type="string">
            <text:p>Rotten Host - Shrine 3</text:p>
          </table:table-cell>
          <table:table-cell office:value-type="string">
            <text:p>Rotten Host - Shrine 4</text:p>
          </table:table-cell>
          <table:table-cell table:number-columns-repeated="3"/>
        </table:table-row>
        <table:table-row table:style-name="ro1">
          <table:table-cell office:value-type="string">
            <text:p>Rotten Host - Chariot </text:p>
          </table:table-cell>
          <table:table-cell office:value-type="currency" office:currency="EUR" office:value="20">
            <text:p>20,00 €</text:p>
          </table:table-cell>
          <table:table-cell table:number-columns-repeated="2"/>
          <table:table-cell office:value-type="string">
            <text:p>Rotten Host - Chariot 1</text:p>
          </table:table-cell>
          <table:table-cell office:value-type="string">
            <text:p>Rotten Host - Chariot 2</text:p>
          </table:table-cell>
          <table:table-cell office:value-type="string">
            <text:p>Rotten Host - Chariot 3</text:p>
          </table:table-cell>
          <table:table-cell office:value-type="string">
            <text:p>Rotten Host - Chariot 4</text:p>
          </table:table-cell>
          <table:table-cell table:number-columns-repeated="3"/>
        </table:table-row>
        <table:table-row table:style-name="ro1">
          <table:table-cell office:value-type="string">
            <text:p>Rotten Host - Spawn </text:p>
          </table:table-cell>
          <table:table-cell office:value-type="currency" office:currency="EUR" office:value="80">
            <text:p>80,00 €</text:p>
          </table:table-cell>
          <table:table-cell table:number-columns-repeated="2"/>
          <table:table-cell office:value-type="string">
            <text:p>Rotten Host - Spawn 1</text:p>
          </table:table-cell>
          <table:table-cell office:value-type="string">
            <text:p>Rotten Host - Spawn 2</text:p>
          </table:table-cell>
          <table:table-cell office:value-type="string">
            <text:p>Rotten Host - Spawn 3</text:p>
          </table:table-cell>
          <table:table-cell office:value-type="string">
            <text:p>Rotten Host - Spawn 4</text:p>
          </table:table-cell>
          <table:table-cell office:value-type="string">
            <text:p>Rotten Host - Spawn 5</text:p>
          </table:table-cell>
          <table:table-cell table:number-columns-repeated="2"/>
        </table:table-row>
        <table:table-row table:style-name="ro1">
          <table:table-cell office:value-type="string">
            <text:p>Rotten Host - Dragon </text:p>
          </table:table-cell>
          <table:table-cell office:value-type="currency" office:currency="EUR" office:value="70">
            <text:p>70,00 €</text:p>
          </table:table-cell>
          <table:table-cell table:number-columns-repeated="2"/>
          <table:table-cell office:value-type="string">
            <text:p>Rotten Host - Dragon 1</text:p>
          </table:table-cell>
          <table:table-cell office:value-type="string">
            <text:p>Rotten Host - Dragon 2</text:p>
          </table:table-cell>
          <table:table-cell office:value-type="string">
            <text:p>Rotten Host - Dragon 3</text:p>
          </table:table-cell>
          <table:table-cell office:value-type="string">
            <text:p>Rotten Host - Dragon 4</text:p>
          </table:table-cell>
          <table:table-cell office:value-type="string">
            <text:p>Rotten Host - Dragon 5</text:p>
          </table:table-cell>
          <table:table-cell table:number-columns-repeated="2"/>
        </table:table-row>
        <table:table-row table:style-name="ro1">
          <table:table-cell office:value-type="string">
            <text:p>Sons of Depravation - Eidrian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Eidrian 1</text:p>
          </table:table-cell>
          <table:table-cell office:value-type="string">
            <text:p>Sons of Depravation - Eidrian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Eidrian Scenique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Eidrian 1</text:p>
          </table:table-cell>
          <table:table-cell office:value-type="string">
            <text:p>Sons of Depravation - Eidrian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Heroine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Heroine 1</text:p>
          </table:table-cell>
          <table:table-cell office:value-type="string">
            <text:p>Sons of Depravation - Heroine 2</text:p>
          </table:table-cell>
          <table:table-cell office:value-type="string">
            <text:p>Sons of Depravation - Heroine 3</text:p>
          </table:table-cell>
          <table:table-cell table:number-columns-repeated="4"/>
        </table:table-row>
        <table:table-row table:style-name="ro1">
          <table:table-cell office:value-type="string">
            <text:p>Sons of Depravation - Infanterie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Infanterie Etat-Major 1</text:p>
          </table:table-cell>
          <table:table-cell office:value-type="string">
            <text:p>Sons of Depravation - Infanterie Etat-Major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Knights Etat-Major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Knights Etat-Major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Knights x5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Knights x5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Princx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Sons of Depravation - Princx 1</text:p>
          </table:table-cell>
          <table:table-cell office:value-type="string">
            <text:p>Sons of Depravation - Princx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Princx Scenique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Sons of Depravation - Princx 1</text:p>
          </table:table-cell>
          <table:table-cell office:value-type="string">
            <text:p>Sons of Depravation - Princx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Regiment x10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Regiment x10 1</text:p>
          </table:table-cell>
          <table:table-cell office:value-type="string">
            <text:p>Sons of Depravation - Regiment x10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Sorceress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Sorceress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Worm Hero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Worm Hero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Worms x3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Worms x3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BigSpawn</text:p>
          </table:table-cell>
          <table:table-cell office:value-type="currency" office:currency="EUR" office:value="60">
            <text:p>60,00 €</text:p>
          </table:table-cell>
          <table:table-cell office:value-type="string">
            <text:p>100x150 mm</text:p>
          </table:table-cell>
          <table:table-cell office:value-type="string">
            <text:p>130 mm</text:p>
          </table:table-cell>
          <table:table-cell office:value-type="string">
            <text:p>Transfiguration Forces - BigSpawn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Hero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Hero Scenique</text:p>
          </table:table-cell>
          <table:table-cell office:value-type="currency" office:currency="EUR" office:value="54">
            <text:p>5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Hero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Infanterie Etat-Major alt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Infanterie Etat-Major alt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Infanterie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Infanterie Etat-Major 1</text:p>
          </table:table-cell>
          <table:table-cell office:value-type="string">
            <text:p>Transfiguration Forces - Infanterie Etat-Major 2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Infanterie x10 alt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Regiment x10 alt 1</text:p>
          </table:table-cell>
          <table:table-cell office:value-type="string">
            <text:p>Transfiguration Forces - Regiment x10 alt 2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Sorceresson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orceresson 1</text:p>
          </table:table-cell>
          <table:table-cell office:value-type="string">
            <text:p>Transfiguration Forces - Sorceresson 2</text:p>
          </table:table-cell>
          <table:table-cell office:value-type="string">
            <text:p>Transfiguration Forces - Sorceresson 3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Sorceresson Scenique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orceresson 1</text:p>
          </table:table-cell>
          <table:table-cell office:value-type="string">
            <text:p>Transfiguration Forces - Sorceresson 2</text:p>
          </table:table-cell>
          <table:table-cell office:value-type="string">
            <text:p>Transfiguration Forces - Sorceresson 3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Spawns x3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Transfiguration Forces - Spawns x3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SupremeSorcere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upremeSorcerer 1</text:p>
          </table:table-cell>
          <table:table-cell office:value-type="string">
            <text:p>Transfiguration Forces - SupremeSorcerer 2</text:p>
          </table:table-cell>
          <table:table-cell office:value-type="string">
            <text:p>Transfiguration Forces - SupremeSorcerer 3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SupremeSorcerer Scenique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upremeSorcerer 1</text:p>
          </table:table-cell>
          <table:table-cell office:value-type="string">
            <text:p>Transfiguration Forces - SupremeSorcerer 2</text:p>
          </table:table-cell>
          <table:table-cell office:value-type="string">
            <text:p>Transfiguration Forces - SupremeSorcerer 3</text:p>
          </table:table-cell>
          <table:table-cell table:number-columns-repeated="4"/>
        </table:table-row>
        <table:table-row table:style-name="ro3">
          <table:table-cell office:value-type="string">
            <text:p>Warriors of the Dark God - Warriors Etat-Major </text:p>
          </table:table-cell>
          <table:table-cell office:value-type="currency" office:currency="EUR" office:value="4">
            <text:p>4,00 €</text:p>
          </table:table-cell>
          <table:table-cell table:number-columns-repeated="2"/>
          <table:table-cell office:value-type="string">
            <text:p>Warriors of the Dark God - Warriors Etat-Major 1</text:p>
          </table:table-cell>
          <table:table-cell office:value-type="string">
            <text:p>Warriors of the Dark God - Warriors Etat-Major 2</text:p>
          </table:table-cell>
          <table:table-cell office:value-type="string">
            <text:p>Warriors of the Dark God - Warriors Etat-Major 3</text:p>
          </table:table-cell>
          <table:table-cell table:number-columns-repeated="4"/>
        </table:table-row>
        <table:table-row table:style-name="ro2">
          <table:table-cell office:value-type="string">
            <text:p>Warriors of the Dark God - Warriors x10 </text:p>
          </table:table-cell>
          <table:table-cell office:value-type="currency" office:currency="EUR" office:value="12">
            <text:p>12,00 €</text:p>
          </table:table-cell>
          <table:table-cell table:number-columns-repeated="2"/>
          <table:table-cell office:value-type="string">
            <text:p>Warriors of the Dark God - Warriors x10 1</text:p>
          </table:table-cell>
          <table:table-cell office:value-type="string">
            <text:p>Warriors of the Dark God - Warriors x10 2</text:p>
          </table:table-cell>
          <table:table-cell office:value-type="string">
            <text:p>Warriors of the Dark God - Warriors x10 3</text:p>
          </table:table-cell>
          <table:table-cell office:value-type="string">
            <text:p>Warriors of the Dark God - Warriors x10 4</text:p>
          </table:table-cell>
          <table:table-cell office:value-type="string">
            <text:p>Warriors of the Dark God - Warriors x10 5</text:p>
          </table:table-cell>
          <table:table-cell office:value-type="string">
            <text:p>Warriors of the Dark God - Warriors x10 6</text:p>
          </table:table-cell>
          <table:table-cell/>
        </table:table-row>
        <table:table-row table:style-name="ro2">
          <table:table-cell office:value-type="string">
            <text:p>Warriors of the Dark God - Warrior Hero 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Warriors of the Dark God - Warrior Hero 1</text:p>
          </table:table-cell>
          <table:table-cell office:value-type="string">
            <text:p>Warriors of the Dark God - Warrior Hero 2</text:p>
          </table:table-cell>
          <table:table-cell office:value-type="string">
            <text:p>Warriors of the Dark God - Warrior Hero 3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Forsworn - Etat-Major</text:p>
          </table:table-cell>
          <table:table-cell office:value-type="currency" office:currency="EUR" office:value="23">
            <text:p>2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Forsworn - Etat-Major 1</text:p>
          </table:table-cell>
          <table:table-cell office:value-type="string">
            <text:p>Warriors of the Dark God - Forsworn - Etat-Major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Forsworn x3</text:p>
          </table:table-cell>
          <table:table-cell office:value-type="currency" office:currency="EUR" office:value="21">
            <text:p>21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Forsworn x3 1</text:p>
          </table:table-cell>
          <table:table-cell office:value-type="string">
            <text:p>Warriors of the Dark God - Forsworn x3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Infanterie Etat-Majo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s of the Dark God - Infanterie Etat-Major 1</text:p>
          </table:table-cell>
          <table:table-cell office:value-type="string">
            <text:p>Warriors of the Dark God - Infanterie Etat-Major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Infanterie Regiment x10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s of the Dark God - Infanterie Regiment x10 1</text:p>
          </table:table-cell>
          <table:table-cell office:value-type="string">
            <text:p>Warriors of the Dark God - Infanterie Regiment x10 2</text:p>
          </table:table-cell>
          <table:table-cell table:number-columns-repeated="5"/>
        </table:table-row>
        <table:table-row table:style-name="ro3">
          <table:table-cell office:value-type="string">
            <text:p>Warrior of the Dark god - Infanterie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 of the Dark god - Infanterie Hero 1</text:p>
          </table:table-cell>
          <table:table-cell office:value-type="string">
            <text:p>Warrior of the Dark god - Infanterie Hero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Werebears - Etat-Major</text:p>
          </table:table-cell>
          <table:table-cell office:value-type="currency" office:currency="EUR" office:value="23">
            <text:p>2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Werebears - Etat-Major 1</text:p>
          </table:table-cell>
          <table:table-cell office:value-type="string">
            <text:p>Warriors of the Dark God - Werebears - Etat-Major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Werebears x3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Werebears x3 1</text:p>
          </table:table-cell>
          <table:table-cell office:value-type="string">
            <text:p>Warriors of the Dark God - Werebears x3 2</text:p>
          </table:table-cell>
          <table:table-cell table:number-columns-repeated="5"/>
        </table:table-row>
        <table:table-row table:style-name="ro2">
          <table:table-cell office:value-type="string">
            <text:p>Warriors of the Dark God - Feldrak Etat-Major </text:p>
          </table:table-cell>
          <table:table-cell office:value-type="currency" office:currency="EUR" office:value="25">
            <text:p>25,00 €</text:p>
          </table:table-cell>
          <table:table-cell table:number-columns-repeated="2"/>
          <table:table-cell office:value-type="string">
            <text:p>Warriors of the Dark God - Feldrak Etat-Major 1</text:p>
          </table:table-cell>
          <table:table-cell office:value-type="string">
            <text:p>Warriors of the Dark God - Feldrak Etat-Major 2</text:p>
          </table:table-cell>
          <table:table-cell office:value-type="string">
            <text:p>Warriors of the Dark God - Feldrak Etat-Major 3</text:p>
          </table:table-cell>
          <table:table-cell office:value-type="string">
            <text:p>Warriors of the Dark God - Feldrak Etat-Major 4</text:p>
          </table:table-cell>
          <table:table-cell office:value-type="string">
            <text:p>Warriors of the Dark God - Feldrak Etat-Major 5</text:p>
          </table:table-cell>
          <table:table-cell office:value-type="string">
            <text:p>Warriors of the Dark God - Feldrak Etat-Major 6</text:p>
          </table:table-cell>
          <table:table-cell office:value-type="string">
            <text:p>Warriors of the Dark God - Feldrak Etat-Major 7</text:p>
          </table:table-cell>
        </table:table-row>
        <table:table-row table:style-name="ro2">
          <table:table-cell office:value-type="string">
            <text:p>Warriors of the Dark God - Feldrak x3 </text:p>
          </table:table-cell>
          <table:table-cell office:value-type="currency" office:currency="EUR" office:value="32">
            <text:p>32,00 €</text:p>
          </table:table-cell>
          <table:table-cell table:number-columns-repeated="2"/>
          <table:table-cell office:value-type="string">
            <text:p>Warriors of the Dark God - Feldrak x3 1</text:p>
          </table:table-cell>
          <table:table-cell office:value-type="string">
            <text:p>Warriors of the Dark God - Feldrak x3 2</text:p>
          </table:table-cell>
          <table:table-cell office:value-type="string">
            <text:p>Warriors of the Dark God - Feldrak x3 3</text:p>
          </table:table-cell>
          <table:table-cell office:value-type="string">
            <text:p>Warriors of the Dark God - Feldrak x3 4</text:p>
          </table:table-cell>
          <table:table-cell office:value-type="string">
            <text:p>Warriors of the Dark God - Feldrak x3 5</text:p>
          </table:table-cell>
          <table:table-cell office:value-type="string">
            <text:p>Warriors of the Dark God - Feldrak x3 6</text:p>
          </table:table-cell>
          <table:table-cell/>
        </table:table-row>
        <table:table-row table:style-name="ro2">
          <table:table-cell office:value-type="string">
            <text:p>Warrior of the Dark god - Hero Feldrak </text:p>
          </table:table-cell>
          <table:table-cell office:value-type="currency" office:currency="EUR" office:value="16">
            <text:p>16,00 €</text:p>
          </table:table-cell>
          <table:table-cell table:number-columns-repeated="2"/>
          <table:table-cell office:value-type="string">
            <text:p>Warrior of the Dark god - Hero Feldrak 1</text:p>
          </table:table-cell>
          <table:table-cell office:value-type="string">
            <text:p>Warrior of the Dark god - Hero Feldrak 2</text:p>
          </table:table-cell>
          <table:table-cell office:value-type="string">
            <text:p>Warrior of the Dark god - Hero Feldrak 3</text:p>
          </table:table-cell>
          <table:table-cell office:value-type="string">
            <text:p>Warrior of the Dark god - Hero Feldrak 4</text:p>
          </table:table-cell>
          <table:table-cell office:value-type="string">
            <text:p>Warrior of the Dark god - Hero Feldrak 5</text:p>
          </table:table-cell>
          <table:table-cell office:value-type="string">
            <text:p>Warrior of the Dark god - Hero Feldrak 6</text:p>
          </table:table-cell>
          <table:table-cell office:value-type="string">
            <text:p>Warrior of the Dark god - Hero Feldrak 7</text:p>
          </table:table-cell>
        </table:table-row>
        <table:table-row table:style-name="ro3">
          <table:table-cell office:value-type="string">
            <text:p>Warriors of the Dark God - Ancient Feldrak</text:p>
          </table:table-cell>
          <table:table-cell office:value-type="currency" office:currency="EUR" office:value="54">
            <text:p>54,00 €</text:p>
          </table:table-cell>
          <table:table-cell office:value-type="string">
            <text:p>75x100 mm</text:p>
          </table:table-cell>
          <table:table-cell office:value-type="string">
            <text:p>120x92 mm</text:p>
          </table:table-cell>
          <table:table-cell office:value-type="string">
            <text:p>Warriors of the Dark God - Ancient Feldrak 1</text:p>
          </table:table-cell>
          <table:table-cell office:value-type="string">
            <text:p>Warriors of the Dark God - Ancient Feldrak 2</text:p>
          </table:table-cell>
          <table:table-cell office:value-type="string">
            <text:p>Warriors of the Dark God - Ancient Feldrak 3</text:p>
          </table:table-cell>
          <table:table-cell office:value-type="string">
            <text:p>Warriors of the Dark God - Ancient Feldrak 4</text:p>
          </table:table-cell>
          <table:table-cell table:number-columns-repeated="3"/>
        </table:table-row>
        <table:table-row table:style-name="ro3" table:number-rows-repeated="1048454">
          <table:table-cell table:number-columns-repeated="11"/>
        </table:table-row>
        <table:table-row table:style-name="ro3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6">16/06/2026</text:date>, <text:time>22:5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16T22:55:03.02</dc:date>
    <dc:creator>Ycham Bounouar</dc:creator>
    <meta:editing-duration>PT1H42M29S</meta:editing-duration>
    <meta:editing-cycles>35</meta:editing-cycles>
    <meta:document-statistic meta:table-count="1" meta:cell-count="797" meta:object-count="0"/>
  </office:meta>
</office:document-meta>
</file>